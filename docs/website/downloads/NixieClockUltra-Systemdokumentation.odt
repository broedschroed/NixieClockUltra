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ic_sch.png" manifest:media-type="image/png"/>
  <manifest:file-entry manifest:full-path="Pictures/logic_pcb_top.png" manifest:media-type="image/png"/>
  <manifest:file-entry manifest:full-path="Pictures/nixie_sch.png" manifest:media-type="image/png"/>
  <manifest:file-entry manifest:full-path="Pictures/nixie_pcb_top.png" manifest:media-type="image/png"/>
  <manifest:file-entry manifest:full-path="Pictures/logic_pcb_bot.png" manifest:media-type="image/png"/>
  <manifest:file-entry manifest:full-path="Pictures/nixie_pcb_b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!-- Tabellen-Zellenstile -->
    <style:style style:name="TableStyle" style:family="table">
      <style:table-properties style:width="16cm" fo:margin-bottom="0.4cm" fo:margin-top="0.2cm"/>
    </style:style>
    <style:style style:name="TH" style:family="table-cell">
      <style:table-cell-properties fo:background-color="#1a3060" fo:padding-top="0.12cm" fo:padding-bottom="0.12cm" fo:padding-left="0.15cm" fo:padding-right="0.15cm" fo:border="0.5pt solid #8899aa"/>
    </style:style>
    <style:style style:name="TD" style:family="table-cell">
      <style:table-cell-properties fo:background-color="#ffffff" fo:padding-top="0.1cm" fo:padding-bottom="0.1cm" fo:padding-left="0.12cm" fo:padding-right="0.12cm" fo:border="0.3pt solid #cccccc"/>
    </style:style>
    <style:style style:name="TD_Alt" style:family="table-cell">
      <style:table-cell-properties fo:background-color="#eef2fa" fo:padding-top="0.1cm" fo:padding-bottom="0.1cm" fo:padding-left="0.12cm" fo:padding-right="0.12cm" fo:border="0.3pt solid #cccccc"/>
    </style:style>
    <style:style style:name="Col1p0" style:family="table-column">
      <style:table-column-properties style:column-width="1.0cm"/>
    </style:style>
    <style:style style:name="Col1p2" style:family="table-column">
      <style:table-column-properties style:column-width="1.2cm"/>
    </style:style>
    <style:style style:name="Col1p5" style:family="table-column">
      <style:table-column-properties style:column-width="1.5cm"/>
    </style:style>
    <style:style style:name="Col1p8" style:family="table-column">
      <style:table-column-properties style:column-width="1.8cm"/>
    </style:style>
    <style:style style:name="Col2p0" style:family="table-column">
      <style:table-column-properties style:column-width="2.0cm"/>
    </style:style>
    <style:style style:name="Col2p5" style:family="table-column">
      <style:table-column-properties style:column-width="2.5cm"/>
    </style:style>
    <style:style style:name="Col3p0" style:family="table-column">
      <style:table-column-properties style:column-width="3.0cm"/>
    </style:style>
    <style:style style:name="Col3p2" style:family="table-column">
      <style:table-column-properties style:column-width="3.2cm"/>
    </style:style>
    <style:style style:name="Col3p5" style:family="table-column">
      <style:table-column-properties style:column-width="3.5cm"/>
    </style:style>
    <style:style style:name="Col4p0" style:family="table-column">
      <style:table-column-properties style:column-width="4.0cm"/>
    </style:style>
    <style:style style:name="Col4p5" style:family="table-column">
      <style:table-column-properties style:column-width="4.5cm"/>
    </style:style>
    <style:style style:name="Col6p0" style:family="table-column">
      <style:table-column-properties style:column-width="6.0cm"/>
    </style:style>
    <style:style style:name="Col6p5" style:family="table-column">
      <style:table-column-properties style:column-width="6.5cm"/>
    </style:style>
    <style:style style:name="Col7p0" style:family="table-column">
      <style:table-column-properties style:column-width="7.0cm"/>
    </style:style>
    <style:style style:name="Col7p1" style:family="table-column">
      <style:table-column-properties style:column-width="7.1cm"/>
    </style:style>
    <style:style style:name="Col7p5" style:family="table-column">
      <style:table-column-properties style:column-width="7.5cm"/>
    </style:style>
    <style:style style:name="Col8p2" style:family="table-column">
      <style:table-column-properties style:column-width="8.2cm"/>
    </style:style>
    <style:style style:name="Col8p8" style:family="table-column">
      <style:table-column-properties style:column-width="8.8cm"/>
    </style:style>
    <style:style style:name="Col9p0" style:family="table-column">
      <style:table-column-properties style:column-width="9.0cm"/>
    </style:style>
    <style:style style:name="Col9p2" style:family="table-column">
      <style:table-column-properties style:column-width="9.2cm"/>
    </style:style>
    <style:style style:name="Col9p5" style:family="table-column">
      <style:table-column-properties style:column-width="9.5cm"/>
    </style:style>
    <style:style style:name="Col10p0" style:family="table-column">
      <style:table-column-properties style:column-width="10.0cm"/>
    </style:style>
    <style:style style:name="Col10p2" style:family="table-column">
      <style:table-column-properties style:column-width="10.2cm"/>
    </style:style>
    <style:style style:name="Col10p3" style:family="table-column">
      <style:table-column-properties style:column-width="10.3cm"/>
    </style:style>
    <style:style style:name="Col11p5" style:family="table-column">
      <style:table-column-properties style:column-width="11.5cm"/>
    </style:style>
  </office:automatic-styles>
  <office:body>
    <office:text>
      <text:p text:style-name="Title">Nixie Clock Ultra</text:p>
      <text:p text:style-name="Subtitle">Systemdokumentation</text:p>
      <text:p text:style-name="Text_Body"/>
      <text:p text:style-name="Text_Body"/>
      <text:p text:style-name="TitleMeta">Version 2.1 · ESP32-S3 · 6 × IN-12A Nixie</text:p>
      <text:p text:style-name="TitleMeta">MCP23017 Direct Drive · DS1302 RTC · WS2812B NeoPixel</text:p>
      <text:p text:style-name="Text_Body"/>
      <text:p text:style-name="TitleMeta">Stand: Juni 2026</text:p>
      <text:p text:style-name="TitleMeta">Projekt: broed digital media</text:p>
      <text:p text:style-name="PageBreak"/>
      <text:h text:style-name="Heading_1" text:outline-level="1">Systemübersicht</text:h>
      <text:p text:style-name="Text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Body">Die Röhren werden ohne Multiplexing direkt angesteuert — jede der 60 Kathoden besitzt einen eigenen SMBTA42-Hochvolt-Transistor. Ghosting-Effekte sind dadurch vollständig eliminiert.</text:p>
      <text:p text:style-name="Text_Body"/>
      <text:h text:style-name="Heading_2" text:outline-level="2">Zweiplatinenaufbau</text:h>
      <table:table table:style-name="TableStyle">
        <table:table-column table:style-name="Col3p2"/>
        <table:table-column table:style-name="Col4p5"/>
        <table:table-column table:style-name="Col1p2"/>
        <table:table-column table:style-name="Col7p1"/>
        <table:table-row>
          <table:table-cell table:style-name="TH">
            <text:p text:style-name="TableH">Platine</text:p>
          </table:table-cell>
          <table:table-cell table:style-name="TH">
            <text:p text:style-name="TableH">KiCAD-Projekt</text:p>
          </table:table-cell>
          <table:table-cell table:style-name="TH">
            <text:p text:style-name="TableH">Rev.</text:p>
          </table:table-cell>
          <table:table-cell table:style-name="TH">
            <text:p text:style-name="TableH">Hauptfunktion</text:p>
          </table:table-cell>
        </table:table-row>
        <table:table-row>
          <table:table-cell table:style-name="TD">
            <text:p text:style-name="TableP">Logic Board</text:p>
          </table:table-cell>
          <table:table-cell table:style-name="TD">
            <text:p text:style-name="TableP">nixieclocklogic_V2-1</text:p>
          </table:table-cell>
          <table:table-cell table:style-name="TD">
            <text:p text:style-name="TableP">2.1</text:p>
          </table:table-cell>
          <table:table-cell table:style-name="TD">
            <text:p text:style-name="TableP">ESP32-S3, DS1302 RTC, DC-DC 5V→10V, HV-MOD, LDR, Taster, IR, USB</text:p>
          </table:table-cell>
        </table:table-row>
        <table:table-row>
          <table:table-cell table:style-name="TD_Alt">
            <text:p text:style-name="TableP">Nixie Display Board</text:p>
          </table:table-cell>
          <table:table-cell table:style-name="TD_Alt">
            <text:p text:style-name="TableP">nixieclockin12_V2</text:p>
          </table:table-cell>
          <table:table-cell table:style-name="TD_Alt">
            <text:p text:style-name="TableP">2.01</text:p>
          </table:table-cell>
          <table:table-cell table:style-name="TD_Alt">
            <text:p text:style-name="TableP">4× MCP23017, 60× SMBTA42, 6× IN-12A, WS2812B</text:p>
          </table:table-cell>
        </table:table-row>
      </table:table>
      <text:p text:style-name="Text_Body"/>
      <text:h text:style-name="Heading_2" text:outline-level="2">Inter-Board-Steckverbinder</text:h>
      <text:p text:style-name="Text_Body">Die beiden Platinen sind über zwei Steckverbinder verbunden. J3 (Logic Board) ↔ J1 (Display Board) führt Logik- und Steuersignale, J4 (Logic Board) ↔ J2 (Display Board) die Hochspannungsversorgung.</text:p>
      <table:table table:style-name="TableStyle">
        <table:table-column table:style-name="Col3p0"/>
        <table:table-column table:style-name="Col1p5"/>
        <table:table-column table:style-name="Col11p5"/>
        <table:table-row>
          <table:table-cell table:style-name="TH">
            <text:p text:style-name="TableH">Steckverbinder</text:p>
          </table:table-cell>
          <table:table-cell table:style-name="TH">
            <text:p text:style-name="TableH">Polig</text:p>
          </table:table-cell>
          <table:table-cell table:style-name="TH">
            <text:p text:style-name="TableH">Signale</text:p>
          </table:table-cell>
        </table:table-row>
        <table:table-row>
          <table:table-cell table:style-name="TD">
            <text:p text:style-name="TableP">J3 ↔ J1  (Logic)</text:p>
          </table:table-cell>
          <table:table-cell table:style-name="TD">
            <text:p text:style-name="TableP">8</text:p>
          </table:table-cell>
          <table:table-cell table:style-name="TD">
            <text:p text:style-name="TableP">VCC 3,3V, GND, SDA (GPIO8), SCL (GPIO9), NEO-Daten (GPIO21)</text:p>
          </table:table-cell>
        </table:table-row>
        <table:table-row>
          <table:table-cell table:style-name="TD_Alt">
            <text:p text:style-name="TableP">J4 ↔ J2  (HV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HV ~170V DC (×2), HVgnd (×2)</text:p>
          </table:table-cell>
        </table:table-row>
      </table:table>
      <text:p text:style-name="Text_Body"/>
      <text:p text:style-name="PageBreak"/>
      <text:h text:style-name="Heading_1" text:outline-level="1">PCB 1 – Logic Board</text:h>
      <text:p text:style-name="Text_Body">Das Logic Board (Rev 2.1, KiCAD: nixieclocklogic_V2-1) trägt alle zentralen Komponenten des Systems: den ESP32-S3-WROOM-1 Mikrocontroller (U1), die DS1302 Echtzeituhr (U2), den VS1838B IR-Empfänger (U3), das HV-Boost-Modul (U4, 10 V → ~170 V), den AMS1117-3.3 LDO-Regler (U5, 5 V → 3,3 V), den DC-DC-Boost-Konverter (U6, 5 V → 10 V), den USB-ESD-Schutz (U22), einen LDR-Helligkeitssensor (J5), vier Taster sowie den Micro-USB-Anschluss (J2).</text:p>
      <text:p text:style-name="Text_Body">Gegenüber Rev 2.0 wurden zwei Änderungen vorgenommen: Das HV-Modul benötigt mindestens 10 V Eingangsspannung, um stabile 170 V für die IN-12A-Röhren zu liefern — direkt aus USB-5 V war dies nicht erreichbar. Daher wurde ein DC-DC-Konverter (5 V → 10 V) ergänzt. Außerdem wurde der LDR-Helligkeitssensor (J5) neu bestückt, der in Rev 2.0 noch nicht vorhanden war.</text:p>
      <text:h text:style-name="Heading_2" text:outline-level="2">Schaltplan</text:h>
      <text:p text:style-name="Text_Body"><draw:frame draw:name="logic_sch" draw:style-name="Graphics" svg:width="15.5cm" svg:height="10.57cm" text:anchor-type="paragraph" draw:z-index="0"><draw:image xlink:href="Pictures/logic_sch.png" xlink:type="simple" xlink:show="embed" xlink:actuate="onLoad"/></draw:frame></text:p>
      <text:p text:style-name="Caption"><text:span text:style-name="Italic">Abb. 1 – Logic Board Rev 2.1 Schaltplan (nixieclocklogic_V2-1)</text:span></text:p>
      <text:p text:style-name="Text_Body"/>
      <text:h text:style-name="Heading_2" text:outline-level="2">PCB-Layout</text:h>
      <text:p text:style-name="Text_Body"><draw:frame draw:name="logic_pcb_top" draw:style-name="Graphics" svg:width="15.5cm" svg:height="4.9cm" text:anchor-type="paragraph" draw:z-index="0"><draw:image xlink:href="Pictures/logic_pcb_top.png" xlink:type="simple" xlink:show="embed" xlink:actuate="onLoad"/></draw:frame></text:p>
      <text:p text:style-name="Caption"><text:span text:style-name="Italic">Abb. 2a – Logic Board Rev 2.1 PCB-Layout Oberseite</text:span></text:p>
      <text:p text:style-name="Text_Body"/>
      <text:p text:style-name="Text_Body"><draw:frame draw:name="logic_pcb_bot" draw:style-name="Graphics" svg:width="15.5cm" svg:height="4.76cm" text:anchor-type="paragraph" draw:z-index="0"><draw:image xlink:href="Pictures/logic_pcb_bot.png" xlink:type="simple" xlink:show="embed" xlink:actuate="onLoad"/></draw:frame></text:p>
      <text:p text:style-name="Caption"><text:span text:style-name="Italic">Abb. 2b – Logic Board Rev 2.1 PCB-Layout Unterseite</text:span></text:p>
      <text:p text:style-name="Text_Body"/>
      <text:h text:style-name="Heading_2" text:outline-level="2">Komponenten</text:h>
      <table:table table:style-name="TableStyle">
        <table:table-column table:style-name="Col1p2"/>
        <table:table-column table:style-name="Col3p5"/>
        <table:table-column table:style-name="Col2p5"/>
        <table:table-column table:style-name="Col8p8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Gehäuse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ESP32-S3-WROOM-1</text:p>
          </table:table-cell>
          <table:table-cell table:style-name="TD">
            <text:p text:style-name="TableP">Modul</text:p>
          </table:table-cell>
          <table:table-cell table:style-name="TD">
            <text:p text:style-name="TableP">Mikrocontroller, WiFi/BT, 4 MB Flash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DS1302N+</text:p>
          </table:table-cell>
          <table:table-cell table:style-name="TD_Alt">
            <text:p text:style-name="TableP">DIP-8</text:p>
          </table:table-cell>
          <table:table-cell table:style-name="TD_Alt">
            <text:p text:style-name="TableP">Batteriegepufferte Echtzeituhr (ThreeWire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VS1838B</text:p>
          </table:table-cell>
          <table:table-cell table:style-name="TD">
            <text:p text:style-name="TableP">TO-92</text:p>
          </table:table-cell>
          <table:table-cell table:style-name="TD">
            <text:p text:style-name="TableP">IR-Empfänger/-Demodulator 38 kHz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HV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Converter 10 V → ~170 V DC für Nixie-Anoden</text:p>
          </table:table-cell>
        </table:table-row>
        <table:table-row>
          <table:table-cell table:style-name="TD">
            <text:p text:style-name="TableP">U5</text:p>
          </table:table-cell>
          <table:table-cell table:style-name="TD">
            <text:p text:style-name="TableP">AMS1117-3.3</text:p>
          </table:table-cell>
          <table:table-cell table:style-name="TD">
            <text:p text:style-name="TableP">SOT-223</text:p>
          </table:table-cell>
          <table:table-cell table:style-name="TD">
            <text:p text:style-name="TableP">LDO-Linearregler 5 V → 3,3 V</text:p>
          </table:table-cell>
        </table:table-row>
        <table:table-row>
          <table:table-cell table:style-name="TD_Alt">
            <text:p text:style-name="TableP">U6</text:p>
          </table:table-cell>
          <table:table-cell table:style-name="TD_Alt">
            <text:p text:style-name="TableP">DC-DC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Konverter 5 V → 10 V (Vorstufe für HV-Modul)</text:p>
          </table:table-cell>
        </table:table-row>
        <table:table-row>
          <table:table-cell table:style-name="TD">
            <text:p text:style-name="TableP">–</text:p>
          </table:table-cell>
          <table:table-cell table:style-name="TD">
            <text:p text:style-name="TableP">TLP627</text:p>
          </table:table-cell>
          <table:table-cell table:style-name="TD">
            <text:p text:style-name="TableP">DIP-4</text:p>
          </table:table-cell>
          <table:table-cell table:style-name="TD">
            <text:p text:style-name="TableP">Optokoppler schaltet Anodenspannung per Hardware-PWM (Nacht-Modus-Dimmung); aktuell handverdrahtet, noch nicht mit eigener Referenz im Schaltplan</text:p>
          </table:table-cell>
        </table:table-row>
        <table:table-row>
          <table:table-cell table:style-name="TD_Alt">
            <text:p text:style-name="TableP">U22</text:p>
          </table:table-cell>
          <table:table-cell table:style-name="TD_Alt">
            <text:p text:style-name="TableP">USBLC6-2SC6</text:p>
          </table:table-cell>
          <table:table-cell table:style-name="TD_Alt">
            <text:p text:style-name="TableP">SOT-23-6</text:p>
          </table:table-cell>
          <table:table-cell table:style-name="TD_Alt">
            <text:p text:style-name="TableP">USB-ESD-/TVS-Schutz</text:p>
          </table:table-cell>
        </table:table-row>
        <table:table-row>
          <table:table-cell table:style-name="TD">
            <text:p text:style-name="TableP">BT1</text:p>
          </table:table-cell>
          <table:table-cell table:style-name="TD">
            <text:p text:style-name="TableP">CR2032</text:p>
          </table:table-cell>
          <table:table-cell table:style-name="TD">
            <text:p text:style-name="TableP">SMD-Halter</text:p>
          </table:table-cell>
          <table:table-cell table:style-name="TD">
            <text:p text:style-name="TableP">RTC-Backup-Batterie (~3 V)</text:p>
          </table:table-cell>
        </table:table-row>
        <table:table-row>
          <table:table-cell table:style-name="TD_Alt">
            <text:p text:style-name="TableP">Y1</text:p>
          </table:table-cell>
          <table:table-cell table:style-name="TD_Alt">
            <text:p text:style-name="TableP">32,768 kHz Quarz</text:p>
          </table:table-cell>
          <table:table-cell table:style-name="TD_Alt">
            <text:p text:style-name="TableP">Radial</text:p>
          </table:table-cell>
          <table:table-cell table:style-name="TD_Alt">
            <text:p text:style-name="TableP">RTC-Taktquelle</text:p>
          </table:table-cell>
        </table:table-row>
        <table:table-row>
          <table:table-cell table:style-name="TD">
            <text:p text:style-name="TableP">SW1–4</text:p>
          </table:table-cell>
          <table:table-cell table:style-name="TD">
            <text:p text:style-name="TableP">Taster SET/UP/DOWN/LIGHT</text:p>
          </table:table-cell>
          <table:table-cell table:style-name="TD">
            <text:p text:style-name="TableP">SMD</text:p>
          </table:table-cell>
          <table:table-cell table:style-name="TD">
            <text:p text:style-name="TableP">Bedienpanel</text:p>
          </table:table-cell>
        </table:table-row>
        <table:table-row>
          <table:table-cell table:style-name="TD_Alt">
            <text:p text:style-name="TableP">SW5</text:p>
          </table:table-cell>
          <table:table-cell table:style-name="TD_Alt">
            <text:p text:style-name="TableP">BOOT</text:p>
          </table:table-cell>
          <table:table-cell table:style-name="TD_Alt">
            <text:p text:style-name="TableP">SMD</text:p>
          </table:table-cell>
          <table:table-cell table:style-name="TD_Alt">
            <text:p text:style-name="TableP">ESP32-Bootmodus (Programmierung)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USB Micro-B</text:p>
          </table:table-cell>
          <table:table-cell table:style-name="TD">
            <text:p text:style-name="TableP">Custom</text:p>
          </table:table-cell>
          <table:table-cell table:style-name="TD">
            <text:p text:style-name="TableP">5 V-Einspeisung &amp; Firmware-Upload</text:p>
          </table:table-cell>
        </table:table-row>
        <table:table-row>
          <table:table-cell table:style-name="TD_Alt">
            <text:p text:style-name="TableP">J3</text:p>
          </table:table-cell>
          <table:table-cell table:style-name="TD_Alt">
            <text:p text:style-name="TableP">PinHeader 1×8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Inter-Board Logik-Signale</text:p>
          </table:table-cell>
        </table:table-row>
        <table:table-row>
          <table:table-cell table:style-name="TD">
            <text:p text:style-name="TableP">J4</text:p>
          </table:table-cell>
          <table:table-cell table:style-name="TD">
            <text:p text:style-name="TableP">PinHeader 1×4</text:p>
          </table:table-cell>
          <table:table-cell table:style-name="TD">
            <text:p text:style-name="TableP">2,54 mm</text:p>
          </table:table-cell>
          <table:table-cell table:style-name="TD">
            <text:p text:style-name="TableP">Inter-Board HV-Versorgung</text:p>
          </table:table-cell>
        </table:table-row>
        <table:table-row>
          <table:table-cell table:style-name="TD_Alt">
            <text:p text:style-name="TableP">J5</text:p>
          </table:table-cell>
          <table:table-cell table:style-name="TD_Alt">
            <text:p text:style-name="TableP">PinHeader 1×2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LDR-Helligkeitssensor (neu in Rev 2.1): LDR→VCC, 100 kΩ→GND, Messung GPIO6</text:p>
          </table:table-cell>
        </table:table-row>
      </table:table>
      <text:p text:style-name="Text_Body"/>
      <text:h text:style-name="Heading_2" text:outline-level="2">Spannungsversorgungskonzept</text:h>
      <text:p text:style-name="Text_Body">Die Versorgung erfolgt über den Micro-USB-Anschluss J2 (5 V). Aus der 5-V-Schiene erzeugen drei Wandler die benötigten Spannungen:</text:p>
      <text:h text:style-name="Heading_3" text:outline-level="3">3,3-V-Logikversorgung (AMS1117-3.3)</text:h>
      <text:p text:style-name="Text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3" text:outline-level="3">10-V-Zwischenstufe (DC-DC-MOD)</text:h>
      <text:p text:style-name="Text_Body">Das HV-Boost-Modul (U4) benötigt eine Eingangsspannung von mindestens 10 V, um zuverlässig ~170 V für die IN-12A-Röhren zu erzeugen — die USB-Einspannung von 5 V reicht dafür nicht aus. Der DC-DC-Konverter (U6) hebt die 5-V-USB-Schiene auf stabile 10 V an. Diese 10-V-Schiene speist ausschließlich das HV-Modul.</text:p>
      <text:h text:style-name="Heading_3" text:outline-level="3">Hochspannung ~170 V DC (HV-MOD)</text:h>
      <text:p text:style-name="Text_Body">Der HV-MOD (U4) ist ein Boost-Converter-Modul, das aus 10 V eine geregelte Gleichspannung von ca. 170–180 V erzeugt. Diese Spannung wird auf dem Logic Board über einen TLP627-Optokoppler geführt, bevor sie über J4 an die Anoden aller sechs Nixie-Röhren gelangt. Die Kathoden der jeweils anzuzeigenden Ziffer werden durch NPN-Transistoren auf dem Display Board auf GND gezogen.</text:p>
      <text:h text:style-name="Heading_3" text:outline-level="3">Anoden-Dimmung (TLP627, Hardware-PWM)</text:h>
      <text:p text:style-name="Text_Body">Der TLP627-Optokoppler schaltet die vom HV-MOD kommende Anodenspannung per Hardware-PWM (LEDC, ~200 Hz) auf GPIO7 (HV_SWITCH_PIN). Im Nacht-Modus reduziert die Firmware den Duty-Cycle auf einen einstellbaren Wert zwischen 2 % und 60 % (Standard 25 %, siehe hv_dimmer.ino in firmware.md) statt wie zuvor die Kathoden per Software-PWM zu takten.</text:p>
      <text:p text:style-name="Note">⚠ Hochspannungswarnung: Der HV-Ausgang führt ~170 V DC — lebensgefährlich bei Berührung. Vor Arbeiten an der Schaltung die Versorgung trennen und Kondensatoren entladen.</text:p>
      <text:h text:style-name="Heading_2" text:outline-level="2">ESP32-S3 GPIO-Belegung</text:h>
      <table:table table:style-name="TableStyle">
        <table:table-column table:style-name="Col1p2"/>
        <table:table-column table:style-name="Col2p5"/>
        <table:table-column table:style-name="Col2p0"/>
        <table:table-column table:style-name="Col10p3"/>
        <table:table-row>
          <table:table-cell table:style-name="TH">
            <text:p text:style-name="TableH">GPIO</text:p>
          </table:table-cell>
          <table:table-cell table:style-name="TH">
            <text:p text:style-name="TableH">Signal</text:p>
          </table:table-cell>
          <table:table-cell table:style-name="TH">
            <text:p text:style-name="TableH">Richtung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RTC_CE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Chip Enable (ThreeWire)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RTC_IO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DS1302 Datenleitung (ThreeWire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RTC_CLK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Takt (ThreeWire)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LDR_ADC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LDR-Helligkeitssensor (ADC1, LDR→VCC, 100 kΩ→GND)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HV_SWITCH</text:p>
          </table:table-cell>
          <table:table-cell table:style-name="TD">
            <text:p text:style-name="TableP">Output</text:p>
          </table:table-cell>
          <table:table-cell table:style-name="TD">
            <text:p text:style-name="TableP">TLP627-Optokoppler: Hardware-PWM (~200 Hz, LEDC) schaltet Anodenspannung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I2C_SDA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I²C Daten → 4× MCP23017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2C_SCL</text:p>
          </table:table-cell>
          <table:table-cell table:style-name="TD">
            <text:p text:style-name="TableP">Output</text:p>
          </table:table-cell>
          <table:table-cell table:style-name="TD">
            <text:p text:style-name="TableP">I²C Takt → 4× MCP23017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BTN_LIGHT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LIGHT (INPUT_PULLUP, aktiv LOW)</text:p>
          </table:table-cell>
        </table:table-row>
        <table:table-row>
          <table:table-cell table:style-name="TD">
            <text:p text:style-name="TableP">11</text:p>
          </table:table-cell>
          <table:table-cell table:style-name="TD">
            <text:p text:style-name="TableP">BTN_DOWN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DOWN (INPUT_PULLUP, aktiv LOW)</text:p>
          </table:table-cell>
        </table:table-row>
        <table:table-row>
          <table:table-cell table:style-name="TD_Alt">
            <text:p text:style-name="TableP">12</text:p>
          </table:table-cell>
          <table:table-cell table:style-name="TD_Alt">
            <text:p text:style-name="TableP">BTN_UP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UP (INPUT_PULLUP, aktiv LOW)</text:p>
          </table:table-cell>
        </table:table-row>
        <table:table-row>
          <table:table-cell table:style-name="TD">
            <text:p text:style-name="TableP">13</text:p>
          </table:table-cell>
          <table:table-cell table:style-name="TD">
            <text:p text:style-name="TableP">BTN_SET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SET (INPUT_PULLUP, aktiv LOW)</text:p>
          </table:table-cell>
        </table:table-row>
        <table:table-row>
          <table:table-cell table:style-name="TD_Alt">
            <text:p text:style-name="TableP">21</text:p>
          </table:table-cell>
          <table:table-cell table:style-name="TD_Alt">
            <text:p text:style-name="TableP">NEO_DATA</text:p>
          </table:table-cell>
          <table:table-cell table:style-name="TD_Alt">
            <text:p text:style-name="TableP">Output</text:p>
          </table:table-cell>
          <table:table-cell table:style-name="TD_Alt">
            <text:p text:style-name="TableP">WS2812B DIN (10 LEDs, verkettete Kette)</text:p>
          </table:table-cell>
        </table:table-row>
        <table:table-row>
          <table:table-cell table:style-name="TD">
            <text:p text:style-name="TableP">48</text:p>
          </table:table-cell>
          <table:table-cell table:style-name="TD">
            <text:p text:style-name="TableP">IR_RECV</text:p>
          </table:table-cell>
          <table:table-cell table:style-name="TD">
            <text:p text:style-name="TableP">Input</text:p>
          </table:table-cell>
          <table:table-cell table:style-name="TD">
            <text:p text:style-name="TableP">VS1838B demodulierter 38-kHz-Ausgang</text:p>
          </table:table-cell>
        </table:table-row>
      </table:table>
      <text:p text:style-name="Text_Body"/>
      <text:h text:style-name="Heading_2" text:outline-level="2">Echtzeituhr DS1302</text:h>
      <text:p text:style-name="Text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2" text:outline-level="2">IR-Empfänger VS1838B</text:h>
      <text:p text:style-name="Text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1" text:outline-level="1">PCB 2 – Nixie Display Board</text:h>
      <text:p text:style-name="Text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Sechs WS2812B-SMD-LEDs (Pixel 0–5, GRB) liefern die Röhrenhintergrundbeleuchtung; vier WS2812B-THT-LEDs YF923 (Pixel 6–9, RGB) dienen als Trennpunkt-LEDs zwischen den Zifferngruppen.</text:p>
      <text:h text:style-name="Heading_2" text:outline-level="2">Schaltplan</text:h>
      <text:p text:style-name="Text_Body"><draw:frame draw:name="nixie_sch" draw:style-name="Graphics" svg:width="15.5cm" svg:height="10.96cm" text:anchor-type="paragraph" draw:z-index="0"><draw:image xlink:href="Pictures/nixie_sch.png" xlink:type="simple" xlink:show="embed" xlink:actuate="onLoad"/></draw:frame></text:p>
      <text:p text:style-name="Caption"><text:span text:style-name="Italic">Abb. 3 – Nixie Display Board Rev 2.01 Schaltplan</text:span></text:p>
      <text:p text:style-name="Text_Body"/>
      <text:h text:style-name="Heading_2" text:outline-level="2">PCB-Layout</text:h>
      <text:p text:style-name="Text_Body"><draw:frame draw:name="nixie_pcb_top" draw:style-name="Graphics" svg:width="15.5cm" svg:height="4.43cm" text:anchor-type="paragraph" draw:z-index="0"><draw:image xlink:href="Pictures/nixie_pcb_top.png" xlink:type="simple" xlink:show="embed" xlink:actuate="onLoad"/></draw:frame></text:p>
      <text:p text:style-name="Caption"><text:span text:style-name="Italic">Abb. 4a – Nixie Display Board Rev 2.01 PCB-Layout Oberseite</text:span></text:p>
      <text:p text:style-name="Text_Body"/>
      <text:p text:style-name="Text_Body"><draw:frame draw:name="nixie_pcb_bot" draw:style-name="Graphics" svg:width="15.5cm" svg:height="4.42cm" text:anchor-type="paragraph" draw:z-index="0"><draw:image xlink:href="Pictures/nixie_pcb_bot.png" xlink:type="simple" xlink:show="embed" xlink:actuate="onLoad"/></draw:frame></text:p>
      <text:p text:style-name="Caption"><text:span text:style-name="Italic">Abb. 4b – Nixie Display Board Rev 2.01 PCB-Layout Unterseite</text:span></text:p>
      <text:p text:style-name="Text_Body"/>
      <text:h text:style-name="Heading_2" text:outline-level="2">Komponenten</text:h>
      <table:table table:style-name="TableStyle">
        <table:table-column table:style-name="Col1p8"/>
        <table:table-column table:style-name="Col4p5"/>
        <table:table-column table:style-name="Col1p5"/>
        <table:table-column table:style-name="Col8p2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Anzahl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–U4</text:p>
          </table:table-cell>
          <table:table-cell table:style-name="TD">
            <text:p text:style-name="TableP">MCP23017-E/SO (SOIC-28)</text:p>
          </table:table-cell>
          <table:table-cell table:style-name="TD">
            <text:p text:style-name="TableP">4</text:p>
          </table:table-cell>
          <table:table-cell table:style-name="TD">
            <text:p text:style-name="TableP">16-bit I²C GPIO-Expander, je 16 Ausgänge</text:p>
          </table:table-cell>
        </table:table-row>
        <table:table-row>
          <table:table-cell table:style-name="TD_Alt">
            <text:p text:style-name="TableP">Q1–Q60</text:p>
          </table:table-cell>
          <table:table-cell table:style-name="TD_Alt">
            <text:p text:style-name="TableP">SMBTA42 (TSOT-23)</text:p>
          </table:table-cell>
          <table:table-cell table:style-name="TD_Alt">
            <text:p text:style-name="TableP">60</text:p>
          </table:table-cell>
          <table:table-cell table:style-name="TD_Alt">
            <text:p text:style-name="TableP">NPN 300 V Hochvolt-Transistor als Kathodenschalter</text:p>
          </table:table-cell>
        </table:table-row>
        <table:table-row>
          <table:table-cell table:style-name="TD">
            <text:p text:style-name="TableP">NX1–NX6</text:p>
          </table:table-cell>
          <table:table-cell table:style-name="TD">
            <text:p text:style-name="TableP">IN-12A</text:p>
          </table:table-cell>
          <table:table-cell table:style-name="TD">
            <text:p text:style-name="TableP">6</text:p>
          </table:table-cell>
          <table:table-cell table:style-name="TD">
            <text:p text:style-name="TableP">Numerische Nixie-Röhre, Aufsicht, 10 Kathoden (0–9)</text:p>
          </table:table-cell>
        </table:table-row>
        <table:table-row>
          <table:table-cell table:style-name="TD_Alt">
            <text:p text:style-name="TableP">D1–D6</text:p>
          </table:table-cell>
          <table:table-cell table:style-name="TD_Alt">
            <text:p text:style-name="TableP">WS2812B-SMD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Röhrenhintergrundbeleuchtung, Pixel 0–5 (GRB)</text:p>
          </table:table-cell>
        </table:table-row>
        <table:table-row>
          <table:table-cell table:style-name="TD">
            <text:p text:style-name="TableP">D7–D10</text:p>
          </table:table-cell>
          <table:table-cell table:style-name="TD">
            <text:p text:style-name="TableP">WS2812B-THT (YF923)</text:p>
          </table:table-cell>
          <table:table-cell table:style-name="TD">
            <text:p text:style-name="TableP">4</text:p>
          </table:table-cell>
          <table:table-cell table:style-name="TD">
            <text:p text:style-name="TableP">Trennpunkt-LEDs, Pixel 6–9 (RGB-Farbreihenfolge)</text:p>
          </table:table-cell>
        </table:table-row>
        <table:table-row>
          <table:table-cell table:style-name="TD_Alt">
            <text:p text:style-name="TableP">R1–R64</text:p>
          </table:table-cell>
          <table:table-cell table:style-name="TD_Alt">
            <text:p text:style-name="TableP">3,3 kΩ (0805)</text:p>
          </table:table-cell>
          <table:table-cell table:style-name="TD_Alt">
            <text:p text:style-name="TableP">64</text:p>
          </table:table-cell>
          <table:table-cell table:style-name="TD_Alt">
            <text:p text:style-name="TableP">Basis-Vorwiderstände für SMBTA42</text:p>
          </table:table-cell>
        </table:table-row>
        <table:table-row>
          <table:table-cell table:style-name="TD">
            <text:p text:style-name="TableP">R65–R70</text:p>
          </table:table-cell>
          <table:table-cell table:style-name="TD">
            <text:p text:style-name="TableP">10 kΩ (THT axial)</text:p>
          </table:table-cell>
          <table:table-cell table:style-name="TD">
            <text:p text:style-name="TableP">6</text:p>
          </table:table-cell>
          <table:table-cell table:style-name="TD">
            <text:p text:style-name="TableP">I²C-Bus-Pull-ups + MCP-Adress-Pull-ups</text:p>
          </table:table-cell>
        </table:table-row>
        <table:table-row>
          <table:table-cell table:style-name="TD_Alt">
            <text:p text:style-name="TableP">C1–C4</text:p>
          </table:table-cell>
          <table:table-cell table:style-name="TD_Alt">
            <text:p text:style-name="TableP">100 nF (0805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Abblockkondensatoren je MCP23017 (VCC gegen GND)</text:p>
          </table:table-cell>
        </table:table-row>
        <table:table-row>
          <table:table-cell table:style-name="TD">
            <text:p text:style-name="TableP">J1</text:p>
          </table:table-cell>
          <table:table-cell table:style-name="TD">
            <text:p text:style-name="TableP">PinHeader 1×8 (2,54 mm)</text:p>
          </table:table-cell>
          <table:table-cell table:style-name="TD">
            <text:p text:style-name="TableP">1</text:p>
          </table:table-cell>
          <table:table-cell table:style-name="TD">
            <text:p text:style-name="TableP">Inter-Board Logik-Signale ← Logic Board J3</text:p>
          </table:table-cell>
        </table:table-row>
        <table:table-row>
          <table:table-cell table:style-name="TD_Alt">
            <text:p text:style-name="TableP">J2</text:p>
          </table:table-cell>
          <table:table-cell table:style-name="TD_Alt">
            <text:p text:style-name="TableP">PinHeader 1×4 (2,54 mm)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Inter-Board HV-Versorgung ← Logic Board J4</text:p>
          </table:table-cell>
        </table:table-row>
      </table:table>
      <text:p text:style-name="Text_Body"/>
      <text:h text:style-name="Heading_2" text:outline-level="2">MCP23017 Ansteuerungskonzept</text:h>
      <text:p text:style-name="Text_Body">Die vier MCP23017 (U1–U4) sind am gemeinsamen I²C-Bus (SDA=GPIO8, SCL=GPIO9) angeschlossen. Die I²C-Adressen werden durch die Hardware-Adresspins A0, A1, A2 festgelegt:</text:p>
      <table:table table:style-name="TableStyle">
        <table:table-column table:style-name="Col1p0"/>
        <table:table-column table:style-name="Col2p5"/>
        <table:table-column table:style-name="Col1p0"/>
        <table:table-column table:style-name="Col1p0"/>
        <table:table-column table:style-name="Col1p0"/>
        <table:table-column table:style-name="Col9p5"/>
        <table:table-row>
          <table:table-cell table:style-name="TH">
            <text:p text:style-name="TableH">IC</text:p>
          </table:table-cell>
          <table:table-cell table:style-name="TH">
            <text:p text:style-name="TableH">I²C-Adresse</text:p>
          </table:table-cell>
          <table:table-cell table:style-name="TH">
            <text:p text:style-name="TableH">A2</text:p>
          </table:table-cell>
          <table:table-cell table:style-name="TH">
            <text:p text:style-name="TableH">A1</text:p>
          </table:table-cell>
          <table:table-cell table:style-name="TH">
            <text:p text:style-name="TableH">A0</text:p>
          </table:table-cell>
          <table:table-cell table:style-name="TH">
            <text:p text:style-name="TableH">Zuständige Röhre(n)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0x2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Tube 0 (Stundenzehner), Tube 1 Bits 10–15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0x21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1 Bits 0–3, Tube 2 (Minutenzehner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0x22</text:p>
          </table:table-cell>
          <table:table-cell table:style-name="TD">
            <text:p text:style-name="TableP">0</text:p>
          </table:table-cell>
          <table:table-cell table:style-name="TD">
            <text:p text:style-name="TableP">1</text:p>
          </table:table-cell>
          <table:table-cell table:style-name="TD">
            <text:p text:style-name="TableP">0</text:p>
          </table:table-cell>
          <table:table-cell table:style-name="TD">
            <text:p text:style-name="TableP">Tube 3 (Minuteneiner), Tube 4 Bits 10–15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4 Bits 0–3, Tube 5 (Sekundeneiner)</text:p>
          </table:table-cell>
        </table:table-row>
      </table:table>
      <text:p text:style-name="Text_Body"/>
      <text:p text:style-name="Text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Heading_3" text:outline-level="3">Tube-zu-MCP-Bit-Zuordnung</text:h>
      <text:p text:style-name="Text_Body">Die Verteilung der 60 Kathoden (6 Röhren × 10 Ziffern) auf die MCP-Bits ist in der Firmware als Lookup-Tabelle `digitPin[6][10]` implementiert (Struktur `DigitPin {uint8_t mcp; uint8_t bit;}`):</text:p>
      <table:table table:style-name="TableStyle">
        <table:table-column table:style-name="Col1p0"/>
        <table:table-column table:style-name="Col3p5"/>
        <table:table-column table:style-name="Col2p5"/>
        <table:table-column table:style-name="Col9p0"/>
        <table:table-row>
          <table:table-cell table:style-name="TH">
            <text:p text:style-name="TableH">Tube</text:p>
          </table:table-cell>
          <table:table-cell table:style-name="TH">
            <text:p text:style-name="TableH">Anzeige</text:p>
          </table:table-cell>
          <table:table-cell table:style-name="TH">
            <text:p text:style-name="TableH">MCP</text:p>
          </table:table-cell>
          <table:table-cell table:style-name="TH">
            <text:p text:style-name="TableH">GPA/GPB-Bits</text:p>
          </table:table-cell>
        </table:table-row>
        <table:table-row>
          <table:table-cell table:style-name="TD">
            <text:p text:style-name="TableP">0</text:p>
          </table:table-cell>
          <table:table-cell table:style-name="TD">
            <text:p text:style-name="TableP">Stundenzehner</text:p>
          </table:table-cell>
          <table:table-cell table:style-name="TD">
            <text:p text:style-name="TableP">0x20</text:p>
          </table:table-cell>
          <table:table-cell table:style-name="TD">
            <text:p text:style-name="TableP">Bits 0–9 (Ziffern 1,2,3,4,5,6,7,8,9,0)</text:p>
          </table:table-cell>
        </table:table-row>
        <table:table-row>
          <table:table-cell table:style-name="TD_Alt">
            <text:p text:style-name="TableP">1</text:p>
          </table:table-cell>
          <table:table-cell table:style-name="TD_Alt">
            <text:p text:style-name="TableP">Stundeneiner</text:p>
          </table:table-cell>
          <table:table-cell table:style-name="TD_Alt">
            <text:p text:style-name="TableP">0x20+0x21</text:p>
          </table:table-cell>
          <table:table-cell table:style-name="TD_Alt">
            <text:p text:style-name="TableP">MCP0 Bits 10–15 + MCP1 Bits 0–3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Minutenzehner</text:p>
          </table:table-cell>
          <table:table-cell table:style-name="TD">
            <text:p text:style-name="TableP">0x21</text:p>
          </table:table-cell>
          <table:table-cell table:style-name="TD">
            <text:p text:style-name="TableP">Bits 4–13</text:p>
          </table:table-cell>
        </table:table-row>
        <table:table-row>
          <table:table-cell table:style-name="TD_Alt">
            <text:p text:style-name="TableP">3</text:p>
          </table:table-cell>
          <table:table-cell table:style-name="TD_Alt">
            <text:p text:style-name="TableP">Minuteneiner</text:p>
          </table:table-cell>
          <table:table-cell table:style-name="TD_Alt">
            <text:p text:style-name="TableP">0x22</text:p>
          </table:table-cell>
          <table:table-cell table:style-name="TD_Alt">
            <text:p text:style-name="TableP">Bits 0–9</text:p>
          </table:table-cell>
        </table:table-row>
        <table:table-row>
          <table:table-cell table:style-name="TD">
            <text:p text:style-name="TableP">4</text:p>
          </table:table-cell>
          <table:table-cell table:style-name="TD">
            <text:p text:style-name="TableP">Sekundenzehner</text:p>
          </table:table-cell>
          <table:table-cell table:style-name="TD">
            <text:p text:style-name="TableP">0x22+0x23</text:p>
          </table:table-cell>
          <table:table-cell table:style-name="TD">
            <text:p text:style-name="TableP">MCP2 Bits 10–15 + MCP3 Bits 0–3</text:p>
          </table:table-cell>
        </table:table-row>
        <table:table-row>
          <table:table-cell table:style-name="TD_Alt">
            <text:p text:style-name="TableP">5</text:p>
          </table:table-cell>
          <table:table-cell table:style-name="TD_Alt">
            <text:p text:style-name="TableP">Sekundeneiner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Bits 4–13</text:p>
          </table:table-cell>
        </table:table-row>
      </table:table>
      <text:p text:style-name="Text_Body"/>
      <text:p text:style-name="Text_Body">Ein Digit-Wert von 10 bedeutet «Röhre blank» — es wird kein Bit gesetzt, alle Kathoden bleiben HIGH, die Röhre zeigt nichts an.</text:p>
      <text:h text:style-name="Heading_2" text:outline-level="2">Transistor-Kathodenschaltung</text:h>
      <text:p text:style-name="Text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2" text:outline-level="2">WS2812B NeoPixel-Konfiguration</text:h>
      <text:p text:style-name="Text_Body">Die 10 WS2812B-LEDs sind als verkettete Kette an GPIO21 angeschlossen. SMD- und THT-Varianten haben unterschiedliche Farbreihenfolgen, was in der Firmware berücksichtigt wird:</text:p>
      <table:table table:style-name="TableStyle">
        <table:table-column table:style-name="Col1p5"/>
        <table:table-column table:style-name="Col3p5"/>
        <table:table-column table:style-name="Col3p5"/>
        <table:table-column table:style-name="Col7p5"/>
        <table:table-row>
          <table:table-cell table:style-name="TH">
            <text:p text:style-name="TableH">Pixel</text:p>
          </table:table-cell>
          <table:table-cell table:style-name="TH">
            <text:p text:style-name="TableH">Typ</text:p>
          </table:table-cell>
          <table:table-cell table:style-name="TH">
            <text:p text:style-name="TableH">Farbreihenfolge</text:p>
          </table:table-cell>
          <table:table-cell table:style-name="TH">
            <text:p text:style-name="TableH">Position / Funktion</text:p>
          </table:table-cell>
        </table:table-row>
        <table:table-row>
          <table:table-cell table:style-name="TD">
            <text:p text:style-name="TableP">0–5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GRB</text:p>
          </table:table-cell>
          <table:table-cell table:style-name="TD">
            <text:p text:style-name="TableP">Röhrenhintergrundbeleuchtung (6 LEDs)</text:p>
          </table:table-cell>
        </table:table-row>
        <table:table-row>
          <table:table-cell table:style-name="TD_Alt">
            <text:p text:style-name="TableP">6–9</text:p>
          </table:table-cell>
          <table:table-cell table:style-name="TD_Alt">
            <text:p text:style-name="TableP">WS2812B-THT YF923</text:p>
          </table:table-cell>
          <table:table-cell table:style-name="TD_Alt">
            <text:p text:style-name="TableP">RGB</text:p>
          </table:table-cell>
          <table:table-cell table:style-name="TD_Alt">
            <text:p text:style-name="TableP">Trennpunkt-LEDs zwischen Zifferngruppen (4 LEDs)</text:p>
          </table:table-cell>
        </table:table-row>
      </table:table>
      <text:p text:style-name="Text_Body"/>
      <text:p text:style-name="PageBreak"/>
      <text:h text:style-name="Heading_1" text:outline-level="1">Firmware-Architektur</text:h>
      <text:p text:style-name="Text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2" text:outline-level="2">Modulübersicht</text:h>
      <table:table table:style-name="TableStyle">
        <table:table-column table:style-name="Col4p5"/>
        <table:table-column table:style-name="Col1p5"/>
        <table:table-column table:style-name="Col10p0"/>
        <table:table-row>
          <table:table-cell table:style-name="TH">
            <text:p text:style-name="TableH">Datei</text:p>
          </table:table-cell>
          <table:table-cell table:style-name="TH">
            <text:p text:style-name="TableH">Zeilen</text:p>
          </table:table-cell>
          <table:table-cell table:style-name="TH">
            <text:p text:style-name="TableH">Inhalt / Verantwortlichkeit</text:p>
          </table:table-cell>
        </table:table-row>
        <table:table-row>
          <table:table-cell table:style-name="TD">
            <text:p text:style-name="TableP">NixieClockUltra.ino</text:p>
          </table:table-cell>
          <table:table-cell table:style-name="TD">
            <text:p text:style-name="TableP">481</text:p>
          </table:table-cell>
          <table:table-cell table:style-name="TD">
            <text:p text:style-name="TableP">Globals, setup(), loop(), Edit-Mode-FSM (Zeit+Datum), Nacht-Modus-Globals, Röhrentest-Globals</text:p>
          </table:table-cell>
        </table:table-row>
        <table:table-row>
          <table:table-cell table:style-name="TD_Alt">
            <text:p text:style-name="TableP">nixie_driver.ino</text:p>
          </table:table-cell>
          <table:table-cell table:style-name="TD_Alt">
            <text:p text:style-name="TableP">91</text:p>
          </table:table-cell>
          <table:table-cell table:style-name="TD_Alt">
            <text:p text:style-name="TableP">nixieInit(), nixieWrite(), MCP23017-I²C-Abstraktion, Shadow-Register, Mutex</text:p>
          </table:table-cell>
        </table:table-row>
        <table:table-row>
          <table:table-cell table:style-name="TD">
            <text:p text:style-name="TableP">display.ino</text:p>
          </table:table-cell>
          <table:table-cell table:style-name="TD">
            <text:p text:style-name="TableP">88</text:p>
          </table:table-cell>
          <table:table-cell table:style-name="TD">
            <text:p text:style-name="TableP">setDisplayTime(), setDisplayDate(), commitDigits() (weicher Ziffernwechsel), Slot-Animation</text:p>
          </table:table-cell>
        </table:table-row>
        <table:table-row>
          <table:table-cell table:style-name="TD_Alt">
            <text:p text:style-name="TableP">digit_fade.ino</text:p>
          </table:table-cell>
          <table:table-cell table:style-name="TD_Alt">
            <text:p text:style-name="TableP">77</text:p>
          </table:table-cell>
          <table:table-cell table:style-name="TD_Alt">
            <text:p text:style-name="TableP">startDigitFade(), updateDigitFade(), cancelDigitFade() — non-blocking Crossfade über HV-Dimmer-Duty</text:p>
          </table:table-cell>
        </table:table-row>
        <table:table-row>
          <table:table-cell table:style-name="TD">
            <text:p text:style-name="TableP">buttons.ino</text:p>
          </table:table-cell>
          <table:table-cell table:style-name="TD">
            <text:p text:style-name="TableP">127</text:p>
          </table:table-cell>
          <table:table-cell table:style-name="TD">
            <text:p text:style-name="TableP">Entprell-FSM für 4 Taster, Kurz-/Langdruck, Edit-Mode Zeit+Datum</text:p>
          </table:table-cell>
        </table:table-row>
        <table:table-row>
          <table:table-cell table:style-name="TD_Alt">
            <text:p text:style-name="TableP">rtc.ino</text:p>
          </table:table-cell>
          <table:table-cell table:style-name="TD_Alt">
            <text:p text:style-name="TableP">18</text:p>
          </table:table-cell>
          <table:table-cell table:style-name="TD_Alt">
            <text:p text:style-name="TableP">readRTC(), writeRTC() via DS1302/ThreeWire, liest auch Tag/Monat/Jahr</text:p>
          </table:table-cell>
        </table:table-row>
        <table:table-row>
          <table:table-cell table:style-name="TD">
            <text:p text:style-name="TableP">night_mode.ino</text:p>
          </table:table-cell>
          <table:table-cell table:style-name="TD">
            <text:p text:style-name="TableP">34</text:p>
          </table:table-cell>
          <table:table-cell table:style-name="TD">
            <text:p text:style-name="TableP">LDR-Abtastung (GPIO6, ADC1), updateNightMode(), Zeitbereich-Logik</text:p>
          </table:table-cell>
        </table:table-row>
        <table:table-row>
          <table:table-cell table:style-name="TD_Alt">
            <text:p text:style-name="TableP">hv_dimmer.ino</text:p>
          </table:table-cell>
          <table:table-cell table:style-name="TD_Alt">
            <text:p text:style-name="TableP">12</text:p>
          </table:table-cell>
          <table:table-cell table:style-name="TD_Alt">
            <text:p text:style-name="TableP">hvDimmerInit(), hvDimmerSetDuty() — LEDC-Hardware-PWM für TLP627 auf Anodenspannung</text:p>
          </table:table-cell>
        </table:table-row>
        <table:table-row>
          <table:table-cell table:style-name="TD">
            <text:p text:style-name="TableP">neo_animation.ino</text:p>
          </table:table-cell>
          <table:table-cell table:style-name="TD">
            <text:p text:style-name="TableP">107</text:p>
          </table:table-cell>
          <table:table-cell table:style-name="TD">
            <text:p text:style-name="TableP">Rainbow, Statisch, Puls, Slot, Nacht-Modus-Dimming, Datumsanzeige-Override</text:p>
          </table:table-cell>
        </table:table-row>
        <table:table-row>
          <table:table-cell table:style-name="TD_Alt">
            <text:p text:style-name="TableP">ir_remote.ino</text:p>
          </table:table-cell>
          <table:table-cell table:style-name="TD_Alt">
            <text:p text:style-name="TableP">107</text:p>
          </table:table-cell>
          <table:table-cell table:style-name="TD_Alt">
            <text:p text:style-name="TableP">executeAction(), dispatchIRAction(), handleIR(), 8 IR-Aktionen</text:p>
          </table:table-cell>
        </table:table-row>
        <table:table-row>
          <table:table-cell table:style-name="TD">
            <text:p text:style-name="TableP">tube_test.ino</text:p>
          </table:table-cell>
          <table:table-cell table:style-name="TD">
            <text:p text:style-name="TableP">50</text:p>
          </table:table-cell>
          <table:table-cell table:style-name="TD">
            <text:p text:style-name="TableP">startTubeTest(), updateTubeTest(), stopTubeTest() — non-blocking Röhrentest-State-Machine</text:p>
          </table:table-cell>
        </table:table-row>
        <table:table-row>
          <table:table-cell table:style-name="TD_Alt">
            <text:p text:style-name="TableP">web_server.ino</text:p>
          </table:table-cell>
          <table:table-cell table:style-name="TD_Alt">
            <text:p text:style-name="TableP">781</text:p>
          </table:table-cell>
          <table:table-cell table:style-name="TD_Alt">
            <text:p text:style-name="TableP">Eingebettetes HTML/JS, alle API-Handler, WiFi-Setup, NTP, mDNS</text:p>
          </table:table-cell>
        </table:table-row>
      </table:table>
      <text:p text:style-name="Text_Body"/>
      <text:p text:style-name="Text_Body">Reine Interpolationsmathematik für den Crossfade liegt zusätzlich in digit_fade_math.h (header-only, host-testbar ohne Arduino-Framework, siehe test/digit_fade_math_test.cpp). Analog dazu liegt die reine Ziffern-/Testende-Logik des Röhrentests in tube_test_math.h (siehe test/tube_test_math_test.cpp).</text:p>
      <text:h text:style-name="Heading_2" text:outline-level="2">Bibliotheksabhängigkeiten</text:h>
      <table:table table:style-name="TableStyle">
        <table:table-column table:style-name="Col4p0"/>
        <table:table-column table:style-name="Col4p0"/>
        <table:table-column table:style-name="Col2p0"/>
        <table:table-column table:style-name="Col6p0"/>
        <table:table-row>
          <table:table-cell table:style-name="TH">
            <text:p text:style-name="TableH">Bibliothek</text:p>
          </table:table-cell>
          <table:table-cell table:style-name="TH">
            <text:p text:style-name="TableH">Autor</text:p>
          </table:table-cell>
          <table:table-cell table:style-name="TH">
            <text:p text:style-name="TableH">Version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</text:p>
          </table:table-cell>
          <table:table-cell table:style-name="TD">
            <text:p text:style-name="TableP">aktuell</text:p>
          </table:table-cell>
          <table:table-cell table:style-name="TD">
            <text:p text:style-name="TableP">WS2812B-Ansteuerung (GRB + RGB)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Michael C. Miller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DS1302 RTC über ThreeWire-Protokoll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me-no-dev</text:p>
          </table:table-cell>
          <table:table-cell table:style-name="TD">
            <text:p text:style-name="TableP">aktuell</text:p>
          </table:table-cell>
          <table:table-cell table:style-name="TD">
            <text:p text:style-name="TableP">Async-TCP-Stack für ESP32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me-no-dev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Nicht-blockierender HTTP-Server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Benoit Blanchon</text:p>
          </table:table-cell>
          <table:table-cell table:style-name="TD">
            <text:p text:style-name="TableP">v6.x</text:p>
          </table:table-cell>
          <table:table-cell table:style-name="TD">
            <text:p text:style-name="TableP">JSON-Serialisierung (v7 inkompatibel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David Conran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IR-Empfang NEC/Samsung/Sony/RC5/RC6 …</text:p>
          </table:table-cell>
        </table:table-row>
      </table:table>
      <text:p text:style-name="Text_Body"/>
      <text:p text:style-name="Note">⚠ ArduinoJson muss in Version 6.x installiert sein — Version 7 hat eine inkompatible API.</text:p>
      <text:h text:style-name="Heading_2" text:outline-level="2">Setup-Ablauf</text:h>
      <text:p text:style-name="Text_Body">Die setup()-Funktion wird einmalig nach dem Einschalten ausgeführt:</text:p>
      <table:table table:style-name="TableStyle">
        <table:table-column table:style-name="Col1p2"/>
        <table:table-column table:style-name="Col4p5"/>
        <table:table-column table:style-name="Col10p3"/>
        <table:table-row>
          <table:table-cell table:style-name="TH">
            <text:p text:style-name="TableH">Schritt</text:p>
          </table:table-cell>
          <table:table-cell table:style-name="TH">
            <text:p text:style-name="TableH">Funktion / Aktion</text:p>
          </table:table-cell>
          <table:table-cell table:style-name="TH">
            <text:p text:style-name="TableH">Details</text:p>
          </table:table-cell>
        </table:table-row>
        <table:table-row>
          <table:table-cell table:style-name="TD">
            <text:p text:style-name="TableP">1</text:p>
          </table:table-cell>
          <table:table-cell table:style-name="TD">
            <text:p text:style-name="TableP">Serial.begin(115200)</text:p>
          </table:table-cell>
          <table:table-cell table:style-name="TD">
            <text:p text:style-name="TableP">Debug-Ausgabe aktivieren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pinMode(BTN_*, INPUT_PULLUP)</text:p>
          </table:table-cell>
          <table:table-cell table:style-name="TD_Alt">
            <text:p text:style-name="TableP">Alle 4 Taster-GPIOs konfigurieren (IO10–IO13)</text:p>
          </table:table-cell>
        </table:table-row>
        <table:table-row>
          <table:table-cell table:style-name="TD">
            <text:p text:style-name="TableP">3</text:p>
          </table:table-cell>
          <table:table-cell table:style-name="TD">
            <text:p text:style-name="TableP">strip.begin() / clear()</text:p>
          </table:table-cell>
          <table:table-cell table:style-name="TD">
            <text:p text:style-name="TableP">NeoPixel initialisieren, alle LEDs aus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hvDimmerInit()</text:p>
          </table:table-cell>
          <table:table-cell table:style-name="TD_Alt">
            <text:p text:style-name="TableP">LEDC-PWM auf HV_SWITCH_PIN (GPIO7) anlegen, Duty zunächst 255 (volle Anodenspannung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prefs.begin("nixie")</text:p>
          </table:table-cell>
          <table:table-cell table:style-name="TD">
            <text:p text:style-name="TableP">NVS öffnen: Helligkeit, Anim, SlotIval, IR-Codes, WiFi, Nacht-Modus-Konfiguration inkl. hvDimPct, sowie softFadeSecondEnabled/softFadeDateEnabled/slotSpeedPct laden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nixieInit()</text:p>
          </table:table-cell>
          <table:table-cell table:style-name="TD_Alt">
            <text:p text:style-name="TableP">I²C starten, alle 4 MCP23017 auf Output, alle Bits 0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Rtc.Begin() + readRTC()</text:p>
          </table:table-cell>
          <table:table-cell table:style-name="TD">
            <text:p text:style-name="TableP">DS1302 starten, Uhrzeit + Datum in curHour/Min/Sec/Day/Month/Year laden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setupWifi()</text:p>
          </table:table-cell>
          <table:table-cell table:style-name="TD_Alt">
            <text:p text:style-name="TableP">AP starten (SSID NixieClockCS); STA verbinden + NTP; mDNS als nixieclockcs.local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setupWebServer()</text:p>
          </table:table-cell>
          <table:table-cell table:style-name="TD">
            <text:p text:style-name="TableP">Alle API-Routen registrieren, server.begin()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irrecv.enableIRIn()</text:p>
          </table:table-cell>
          <table:table-cell table:style-name="TD_Alt">
            <text:p text:style-name="TableP">IR-Empfänger aktivieren (GPIO48)</text:p>
          </table:table-cell>
        </table:table-row>
        <table:table-row>
          <table:table-cell table:style-name="TD">
            <text:p text:style-name="TableP">11</text:p>
          </table:table-cell>
          <table:table-cell table:style-name="TD">
            <text:p text:style-name="TableP">startFadeIn = true</text:p>
          </table:table-cell>
          <table:table-cell table:style-name="TD">
            <text:p text:style-name="TableP">Fade-In-Flag setzen → Röhren blenden in loop() ein</text:p>
          </table:table-cell>
        </table:table-row>
      </table:table>
      <text:p text:style-name="Text_Body"/>
      <text:h text:style-name="Heading_2" text:outline-level="2">Globale State-Variablen</text:h>
      <table:table table:style-name="TableStyle">
        <table:table-column table:style-name="Col4p0"/>
        <table:table-column table:style-name="Col2p5"/>
        <table:table-column table:style-name="Col9p5"/>
        <table:table-row>
          <table:table-cell table:style-name="TH">
            <text:p text:style-name="TableH">Variable</text:p>
          </table:table-cell>
          <table:table-cell table:style-name="TH">
            <text:p text:style-name="TableH">Typ</text:p>
          </table:table-cell>
          <table:table-cell table:style-name="TH">
            <text:p text:style-name="TableH">Beschreibung</text:p>
          </table:table-cell>
        </table:table-row>
        <table:table-row>
          <table:table-cell table:style-name="TD">
            <text:p text:style-name="TableP">displayDigits[6]</text:p>
          </table:table-cell>
          <table:table-cell table:style-name="TD">
            <text:p text:style-name="TableP">uint8_t[6]</text:p>
          </table:table-cell>
          <table:table-cell table:style-name="TD">
            <text:p text:style-name="TableP">Aktuell angezeigte Ziffern (0–9; 10 = blank)</text:p>
          </table:table-cell>
        </table:table-row>
        <table:table-row>
          <table:table-cell table:style-name="TD_Alt">
            <text:p text:style-name="TableP">brightLevel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Helligkeitsstufe 0–3 (Index in BRIGHTNESS_LEVELS[])</text:p>
          </table:table-cell>
        </table:table-row>
        <table:table-row>
          <table:table-cell table:style-name="TD">
            <text:p text:style-name="TableP">neoBright</text:p>
          </table:table-cell>
          <table:table-cell table:style-name="TD">
            <text:p text:style-name="TableP">uint8_t</text:p>
          </table:table-cell>
          <table:table-cell table:style-name="TD">
            <text:p text:style-name="TableP">NeoPixel-Feinwert 10–255 (Hintergrund Pixel 0–5)</text:p>
          </table:table-cell>
        </table:table-row>
        <table:table-row>
          <table:table-cell table:style-name="TD_Alt">
            <text:p text:style-name="TableP">colonBrigh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NeoPixel-Feinwert (Trennpunkte Pixel 6–9)</text:p>
          </table:table-cell>
        </table:table-row>
        <table:table-row>
          <table:table-cell table:style-name="TD">
            <text:p text:style-name="TableP">neoHue</text:p>
          </table:table-cell>
          <table:table-cell table:style-name="TD">
            <text:p text:style-name="TableP">uint8_t</text:p>
          </table:table-cell>
          <table:table-cell table:style-name="TD">
            <text:p text:style-name="TableP">Auto-inkrement für Rainbow-Farbverlauf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AnimMode</text:p>
          </table:table-cell>
          <table:table-cell table:style-name="TD_Alt">
            <text:p text:style-name="TableP">Aktueller Animationsmodus (Enum, s. u.)</text:p>
          </table:table-cell>
        </table:table-row>
        <table:table-row>
          <table:table-cell table:style-name="TD">
            <text:p text:style-name="TableP">editState</text:p>
          </table:table-cell>
          <table:table-cell table:style-name="TD">
            <text:p text:style-name="TableP">EditState</text:p>
          </table:table-cell>
          <table:table-cell table:style-name="TD">
            <text:p text:style-name="TableP">Aktueller Einstellschritt (NONE/HOUR/MIN/SEC/DAY/MONTH/YEAR)</text:p>
          </table:table-cell>
        </table:table-row>
        <table:table-row>
          <table:table-cell table:style-name="TD_Alt">
            <text:p text:style-name="TableP">colonAlways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Trennpunkte dauerhaft an (kein Blinken)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Trennpunkte statisch warmweiß</text:p>
          </table:table-cell>
        </table:table-row>
        <table:table-row>
          <table:table-cell table:style-name="TD_Alt">
            <text:p text:style-name="TableP">curDay/Month/Year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Lokal gecachtes Datum (Tag 1–31, Monat 1–12, Jahr 0–99)</text:p>
          </table:table-cell>
        </table:table-row>
        <table:table-row>
          <table:table-cell table:style-name="TD">
            <text:p text:style-name="TableP">dateShow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Datumsanzeige nach Slot-Animation gerade aktiv</text:p>
          </table:table-cell>
        </table:table-row>
        <table:table-row>
          <table:table-cell table:style-name="TD_Alt">
            <text:p text:style-name="TableP">dateShowStart</text:p>
          </table:table-cell>
          <table:table-cell table:style-name="TD_Alt">
            <text:p text:style-name="TableP">uint32_t</text:p>
          </table:table-cell>
          <table:table-cell table:style-name="TD_Alt">
            <text:p text:style-name="TableP">millis()-Zeitstempel beim Start der Datumsanzeige</text:p>
          </table:table-cell>
        </table:table-row>
        <table:table-row>
          <table:table-cell table:style-name="TD">
            <text:p text:style-name="TableP">nightState</text:p>
          </table:table-cell>
          <table:table-cell table:style-name="TD">
            <text:p text:style-name="TableP">NightState</text:p>
          </table:table-cell>
          <table:table-cell table:style-name="TD">
            <text:p text:style-name="TableP">Aktueller Nacht-Modus-Zustand (NORMAL/DIM/DARK)</text:p>
          </table:table-cell>
        </table:table-row>
        <table:table-row>
          <table:table-cell table:style-name="TD_Alt">
            <text:p text:style-name="TableP">nightTimeEnabl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Zeitbereich-Nacht-Modus aktiv</text:p>
          </table:table-cell>
        </table:table-row>
        <table:table-row>
          <table:table-cell table:style-name="TD">
            <text:p text:style-name="TableP">nightStart/End</text:p>
          </table:table-cell>
          <table:table-cell table:style-name="TD">
            <text:p text:style-name="TableP">uint8_t</text:p>
          </table:table-cell>
          <table:table-cell table:style-name="TD">
            <text:p text:style-name="TableP">Start-/Endstunde des Nacht-Bereichs (0–23)</text:p>
          </table:table-cell>
        </table:table-row>
        <table:table-row>
          <table:table-cell table:style-name="TD_Alt">
            <text:p text:style-name="TableP">nightTimeMode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0 = Gedimmt, 1 = Dunkel</text:p>
          </table:table-cell>
        </table:table-row>
        <table:table-row>
          <table:table-cell table:style-name="TD">
            <text:p text:style-name="TableP">ldrEnabled</text:p>
          </table:table-cell>
          <table:table-cell table:style-name="TD">
            <text:p text:style-name="TableP">bool</text:p>
          </table:table-cell>
          <table:table-cell table:style-name="TD">
            <text:p text:style-name="TableP">Lichtsensor-Steuerung aktiv</text:p>
          </table:table-cell>
        </table:table-row>
        <table:table-row>
          <table:table-cell table:style-name="TD_Alt">
            <text:p text:style-name="TableP">ldrThreshold</text:p>
          </table:table-cell>
          <table:table-cell table:style-name="TD_Alt">
            <text:p text:style-name="TableP">uint16_t</text:p>
          </table:table-cell>
          <table:table-cell table:style-name="TD_Alt">
            <text:p text:style-name="TableP">ADC-Schwellwert (0–4095); &lt;= Schwellwert → Dimmen</text:p>
          </table:table-cell>
        </table:table-row>
        <table:table-row>
          <table:table-cell table:style-name="TD">
            <text:p text:style-name="TableP">ldrReading</text:p>
          </table:table-cell>
          <table:table-cell table:style-name="TD">
            <text:p text:style-name="TableP">uint16_t</text:p>
          </table:table-cell>
          <table:table-cell table:style-name="TD">
            <text:p text:style-name="TableP">Aktueller ADC-Messwert (alle 500 ms aktualisiert)</text:p>
          </table:table-cell>
        </table:table-row>
        <table:table-row>
          <table:table-cell table:style-name="TD_Alt">
            <text:p text:style-name="TableP">hvDimPc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Röhren-Dimm-Helligkeit im Nacht-Modus in % (2–60, Default 25)</text:p>
          </table:table-cell>
        </table:table-row>
        <table:table-row>
          <table:table-cell table:style-name="TD">
            <text:p text:style-name="TableP">irCodes[8]</text:p>
          </table:table-cell>
          <table:table-cell table:style-name="TD">
            <text:p text:style-name="TableP">uint64_t[8]</text:p>
          </table:table-cell>
          <table:table-cell table:style-name="TD">
            <text:p text:style-name="TableP">Angelernte IR-Codes, Index = IrAction-Enum (0–7)</text:p>
          </table:table-cell>
        </table:table-row>
        <table:table-row>
          <table:table-cell table:style-name="TD_Alt">
            <text:p text:style-name="TableP">wifiStaConnect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TA-Verbindung zum Heimnetz aktiv</text:p>
          </table:table-cell>
        </table:table-row>
        <table:table-row>
          <table:table-cell table:style-name="TD">
            <text:p text:style-name="TableP">ntpSynced</text:p>
          </table:table-cell>
          <table:table-cell table:style-name="TD">
            <text:p text:style-name="TableP">bool</text:p>
          </table:table-cell>
          <table:table-cell table:style-name="TD">
            <text:p text:style-name="TableP">NTP-Synchronisierung erfolgreich</text:p>
          </table:table-cell>
        </table:table-row>
        <table:table-row>
          <table:table-cell table:style-name="TD_Alt">
            <text:p text:style-name="TableP">slotActive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lot-Machine-Animation läuft</text:p>
          </table:table-cell>
        </table:table-row>
        <table:table-row>
          <table:table-cell table:style-name="TD">
            <text:p text:style-name="TableP">startFadeIn</text:p>
          </table:table-cell>
          <table:table-cell table:style-name="TD">
            <text:p text:style-name="TableP">bool</text:p>
          </table:table-cell>
          <table:table-cell table:style-name="TD">
            <text:p text:style-name="TableP">Einblend-Sequenz beim Start aktiv</text:p>
          </table:table-cell>
        </table:table-row>
        <table:table-row>
          <table:table-cell table:style-name="TD_Alt">
            <text:p text:style-name="TableP">softFadeSecondEnabl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Weicher Ziffernwechsel im Sekundentakt aktiv</text:p>
          </table:table-cell>
        </table:table-row>
        <table:table-row>
          <table:table-cell table:style-name="TD">
            <text:p text:style-name="TableP">softFadeDateEnabled</text:p>
          </table:table-cell>
          <table:table-cell table:style-name="TD">
            <text:p text:style-name="TableP">bool</text:p>
          </table:table-cell>
          <table:table-cell table:style-name="TD">
            <text:p text:style-name="TableP">Weicher Ziffernwechsel bei Zeit/Datum-Übergang aktiv</text:p>
          </table:table-cell>
        </table:table-row>
        <table:table-row>
          <table:table-cell table:style-name="TD_Alt">
            <text:p text:style-name="TableP">slotSpeedPc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Slot-Machine-Rollgeschwindigkeit 20–100 % (100 = Standard)</text:p>
          </table:table-cell>
        </table:table-row>
        <table:table-row>
          <table:table-cell table:style-name="TD">
            <text:p text:style-name="TableP">tubeTest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Röhrentest läuft gerade</text:p>
          </table:table-cell>
        </table:table-row>
        <table:table-row>
          <table:table-cell table:style-name="TD_Alt">
            <text:p text:style-name="TableP">tubeTestDigi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Aktuell angezeigte Testziffer (0–9)</text:p>
          </table:table-cell>
        </table:table-row>
        <table:table-row>
          <table:table-cell table:style-name="TD">
            <text:p text:style-name="TableP">tubeTestStepStart</text:p>
          </table:table-cell>
          <table:table-cell table:style-name="TD">
            <text:p text:style-name="TableP">uint32_t</text:p>
          </table:table-cell>
          <table:table-cell table:style-name="TD">
            <text:p text:style-name="TableP">millis() beim Anzeigen der aktuellen Testziffer</text:p>
          </table:table-cell>
        </table:table-row>
      </table:table>
      <text:p text:style-name="Text_Body"/>
      <text:h text:style-name="Heading_2" text:outline-level="2">Enumerationen</text:h>
      <text:p text:style-name="Code">enum AnimMode   { ANIM_RAINBOW, ANIM_STATIC, ANIM_PULSE, ANIM_COUNT };</text:p>
      <text:p text:style-name="Code"/>
      <text:p text:style-name="Code">enum EditState  { EDIT_NONE,</text:p>
      <text:p text:style-name="Code">                  EDIT_HOUR, EDIT_MIN, EDIT_SEC,</text:p>
      <text:p text:style-name="Code">                  EDIT_DAY, EDIT_MONTH, EDIT_YEAR };</text:p>
      <text:p text:style-name="Code"/>
      <text:p text:style-name="Code">enum NightState { NIGHT_NORMAL, NIGHT_DIM, NIGHT_DARK };</text:p>
      <text:p text:style-name="Code"/>
      <text:p text:style-name="Code">enum IrAction   {</text:p>
      <text:p text:style-name="Code">    IR_LEARN_NONE          = -1,</text:p>
      <text:p text:style-name="Code">    IR_ACTION_SET          = 0,  IR_ACTION_UP          = 1,</text:p>
      <text:p text:style-name="Code">    IR_ACTION_DOWN         = 2,  IR_ACTION_BRIGHTNESS  = 3,</text:p>
      <text:p text:style-name="Code">    IR_ACTION_ANIM_NEXT    = 4,  IR_ACTION_SLOT        = 5,</text:p>
      <text:p text:style-name="Code">    IR_ACTION_COLON_TOGGLE = 6,  IR_ACTION_DATE        = 7,</text:p>
      <text:p text:style-name="Code">    IR_ACTION_COUNT        = 8</text:p>
      <text:p text:style-name="Code">};</text:p>
      <text:h text:style-name="Heading_2" text:outline-level="2">hv_dimmer.ino – Hardware-PWM-Dimmung der Anodenspannung</text:h>
      <text:p text:style-name="Text_Body">Die Röhren-Dimmung im Nacht-Modus erfolgt über einen TLP627-Optokoppler, der die Anodenspannung selbst per LEDC-Hardware-PWM (~200 Hz) auf HV_SWITCH_PIN (GPIO7) schaltet — nicht mehr über eine Software-PWM auf den Kathoden:</text:p>
      <text:p text:style-name="Code">void hvDimmerInit() {</text:p>
      <text:p text:style-name="Code">    ledcAttach(HV_SWITCH_PIN, HV_PWM_FREQ_HZ, 8);</text:p>
      <text:p text:style-name="Code">    ledcWrite(HV_SWITCH_PIN, 255);   // volle Helligkeit (Anode dauerhaft an)</text:p>
      <text:p text:style-name="Code">}</text:p>
      <text:p text:style-name="Code"/>
      <text:p text:style-name="Code">void hvDimmerSetDuty(uint8_t duty0to255) {</text:p>
      <text:p text:style-name="Code">    ledcWrite(HV_SWITCH_PIN, duty0to255);</text:p>
      <text:p text:style-name="Code">}</text:p>
      <text:p text:style-name="Text_Body">loop() ruft hvDimmerSetDuty() nur bei einem Wechsel von nightState auf (Guard nightState != prevNightState), nicht bei jedem Durchlauf: NIGHT_NORMAL → Duty 255, NIGHT_DIM → Duty hvDimPct*255/100 (2–60 %), NIGHT_DARK → Duty 0. Ein separater Blitzschutz für Sekundenwechsel ist nicht nötig, da die Kathoden-Ansteuerung unabhängig von der Anodendimmung läuft.</text:p>
      <text:h text:style-name="Heading_2" text:outline-level="2">digit_fade.ino – Weicher Ziffernwechsel</text:h>
      <text:p text:style-name="Text_Body">commitDigits() in display.ino ist die zentrale Stelle, über die alle Ziffernänderungen laufen (setDisplayTime(), setDisplayDate() sowie die Soft-Varianten setDisplayTimeSoft()/setDisplayDateSoft()). Sie vergleicht per memcmp() gegen displayDigits, um unveränderte Aufrufe zu ignorieren, und entscheidet dann: fadeMs == 0 oder nightState != NIGHT_NORMAL → sofortiger Hart-Wechsel über nixieWrite() (im Nacht-Modus kein Fade, da die Anodenspannung dort bereits gedimmt/aus ist); fadeMs &gt; 0 → startDigitFade().</text:p>
      <text:p text:style-name="Text_Body">startDigitFade()/updateDigitFade() bilden eine non-blocking State-Machine (angetrieben aus loop()), die den HV-Dimmer-Duty (hvDimmerSetDuty()) in 5-ms-Schritten (DIGIT_FADE_STEP_MS) erst auf DIGIT_FADE_MIN_DUTY (13, ≈5 %) abblendet, bei Minimalhelligkeit die Zielziffern schreibt (nixieWrite()), und wieder auf 255 aufblendet. Die Dauer wird über fadeMs gesteuert (je zur Hälfte Ab-/Aufblenden); aktuell fest verdrahtet auf 400 ms (softFadeSecondEnabled bzw. softFadeDateEnabled in NixieClockUltra.ino). Die reine Interpolationsmathematik (fadeDutyForStep()) liegt in digit_fade_math.h und ist per Host-Unit-Test ohne Arduino-Framework testbar.</text:p>
      <text:p text:style-name="Text_Body">cancelDigitFade() schließt einen laufenden Fade sofort ab (Zielziffern schreiben, Duty unangetastet) und wird vor startSlotAnimation() sowie beim Eintritt in den Edit-Modus aufgerufen — Absicherung gegen eine Race zwischen laufendem Fade und neuer Display-Aktivität.</text:p>
      <text:h text:style-name="Heading_2" text:outline-level="2">Slot-Machine-Geschwindigkeit</text:h>
      <text:p text:style-name="Text_Body">slotSpeedPct (20–100 %, Standard 100) skaliert sowohl slotRollIntervalMs als auch die gestaffelten Stopp-Zeitpunkte je Röhre (slotStopMs[i]) in startSlotAnimation() (display.ino) — bei kleineren Werten rollen die Ziffern langsamer und die Animation dauert insgesamt länger.</text:p>
      <text:h text:style-name="Heading_2" text:outline-level="2">Nacht-Modus (night_mode.ino)</text:h>
      <text:p text:style-name="Text_Body">updateNightMode() wird jeden Loop-Durchlauf aufgerufen und bestimmt den nightState in drei Stufen:</text:p>
      <table:table table:style-name="TableStyle">
        <table:table-column table:style-name="Col2p5"/>
        <table:table-column table:style-name="Col6p5"/>
        <table:table-column table:style-name="Col7p0"/>
        <table:table-row>
          <table:table-cell table:style-name="TH">
            <text:p text:style-name="TableH">Priorität</text:p>
          </table:table-cell>
          <table:table-cell table:style-name="TH">
            <text:p text:style-name="TableH">Bedingung</text:p>
          </table:table-cell>
          <table:table-cell table:style-name="TH">
            <text:p text:style-name="TableH">Ergebnis</text:p>
          </table:table-cell>
        </table:table-row>
        <table:table-row>
          <table:table-cell table:style-name="TD">
            <text:p text:style-name="TableP">1 (höchste)</text:p>
          </table:table-cell>
          <table:table-cell table:style-name="TD">
            <text:p text:style-name="TableP">nightTimeEnabled &amp;&amp; Stunde im konfigurierten Bereich</text:p>
          </table:table-cell>
          <table:table-cell table:style-name="TD">
            <text:p text:style-name="TableP">NIGHT_DIM oder NIGHT_DARK (je nach nightTimeMode)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ldrEnabled &amp;&amp; ldrReading &lt;= ldrThreshold</text:p>
          </table:table-cell>
          <table:table-cell table:style-name="TD_Alt">
            <text:p text:style-name="TableP">NIGHT_DIM (LDR kann nur dimmen, nicht dunkel)</text:p>
          </table:table-cell>
        </table:table-row>
        <table:table-row>
          <table:table-cell table:style-name="TD">
            <text:p text:style-name="TableP">3 (Fallback)</text:p>
          </table:table-cell>
          <table:table-cell table:style-name="TD">
            <text:p text:style-name="TableP">keine der obigen Bedingungen</text:p>
          </table:table-cell>
          <table:table-cell table:style-name="TD">
            <text:p text:style-name="TableP">NIGHT_NORMAL</text:p>
          </table:table-cell>
        </table:table-row>
      </table:table>
      <text:p text:style-name="Text_Body"/>
      <text:p text:style-name="Text_Body">Der LDR (GPIO6, ADC1) wird immer alle 500 ms abgetastet — unabhängig davon ob ldrEnabled gesetzt ist. So ist der Rohwert im Web-UI immer aktuell. LDR→VCC, 100 kΩ→GND: Helligkeit = hoher ADC-Wert, Dunkelheit = niedriger Wert.</text:p>
      <text:h text:style-name="Heading_2" text:outline-level="2">Datumsanzeige</text:h>
      <text:p text:style-name="Text_Body">Nach jeder Slot-Animation und bei IR-Taste DATUM wird dateShowActive=true gesetzt. Für 5000 ms (DATE_SHOW_MS) zeigen die Röhren das Datum im Format TT MM JJ. Die NeoPixel-Ausgabe in neo_animation.ino überschreibt dabei alle Pixel: Hintergrund (0–5) und obere Trennpunkte (Pixel 6, 8) werden gelöscht. Nur die unteren Trennpunkte (Pixel 7 und 9) leuchten in warmweiß — ein visueller Hinweis, dass Datum statt Uhrzeit angezeigt wird.</text:p>
      <text:h text:style-name="Heading_2" text:outline-level="2">Röhrentest (tube_test.ino)</text:h>
      <text:p text:style-name="Text_Body">Diagnose-Feature: Auf Anfrage zeigen alle 6 Röhren synchron dieselbe Ziffer, in Schritten von 0 bis 9, je TUBE_TEST_STEP_MS (2000 ms) — insgesamt ~20 s. Zweck: jede Ziffer auf jeder Röhre einmal sichtbar durchprüfen (defekte Kathode, kalter Lötpunkt an Transistor/MCP23017), was die Slot-Machine-Animation nicht leistet (dort steht nie jede Röhre synchron auf derselben Ziffer still).</text:p>
      <text:p text:style-name="Text_Body">startTubeTest() bricht konkurrierende Display-Nutzer ab (cancelDigitFade(), slotActive=false, dateShowActive=false, editState=EDIT_NONE), erzwingt hvDimmerSetDuty(255) unabhängig vom Nacht-Modus und schreibt Ziffer 0 sofort hart auf alle Röhren. Erneuter Aufruf während eines laufenden Tests setzt ihn einfach auf Ziffer 0 zurück (kein Fehlerfall). updateTubeTest() (aus loop()) schaltet alle TUBE_TEST_STEP_MS eine Ziffer weiter, bis tubeTestIsFinished() (aus tube_test_math.h) nach Ziffer 9 true liefert → stopTubeTest(). stopTubeTest() stellt die HV-Duty passend zum aktuellen nightState wieder her (identischer Switch wie im Nacht-Modus-Block in loop()), synchronisiert prevNightState (verhindert eine doppelte Duty-Anwendung im nächsten loop()-Durchlauf) und zeigt sofort wieder die aktuelle Uhrzeit an. Aufruf ohne laufenden Test ist ein No-op.</text:p>
      <text:p text:style-name="Text_Body">Guards in loop(): Der bestehende Nacht-Modus-Duty-Block (nightState != prevNightState) prüft zusätzlich !tubeTestActive, damit ein Nacht-Modus-Wechsel die erzwungene volle Helligkeit während des Tests nicht überschreibt. Ebenso pausiert handleEditMode() sowie der Sekundentakt-/Slot-Trigger-Block vollständig, solange tubeTestActive gesetzt ist.</text:p>
      <text:p text:style-name="Note">⚠ Bekannte Einschränkung: Die IR-Fernbedienung (handleIR()) läuft unguardet vor diesen Prüfungen — SLOT/DATE/SET per Fernbedienung während eines laufenden Tests können die Anzeige durcheinanderbringen bzw. den Editiermodus nach Testende hängen lassen. Bewusst akzeptierter Edge-Case (seltene gleichzeitige IR-Eingabe während der ~20 s Testdauer), nicht behoben.</text:p>
      <text:p text:style-name="Text_Body">Web-API: POST /api/tubetest/start und POST /api/tubetest/stop rufen direkt startTubeTest()/stopTubeTest() aus dem Async-Webserver-Task auf — analog zu /api/settime, nicht zum Flag-only-Muster von /api/slot. nixieWrite() ist über den bestehenden FreeRTOS-Mutex gegen den gleichzeitigen Zugriff aus loop() abgesichert.</text:p>
      <text:h text:style-name="Heading_2" text:outline-level="2">nixie_driver.ino – Direkte MCP23017-Ansteuerung</text:h>
      <text:p text:style-name="Text_Body">Der Nixie-Treiber implementiert die direkte, multiplexingfreie Ansteuerung der 6 Röhren. Kernfunktionen:</text:p>
      <text:h text:style-name="Heading_3" text:outline-level="3">nixieInit()</text:h>
      <text:p text:style-name="Text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Heading_3" text:outline-level="3">nixieWrite(uint8_t digits[6])</text:h>
      <text:p text:style-name="Text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         // Register 0x14</text:p>
      <text:p text:style-name="Code">Wire.write((uint8_t)(val &amp; 0xFF));     // GPA (Low-Byte)</text:p>
      <text:p text:style-name="Code">Wire.write((uint8_t)((val &gt;&gt; 8)&amp;0xFF));// GPB (High-Byte)</text:p>
      <text:p text:style-name="Code">Wire.endTransmission();</text:p>
      <text:h text:style-name="Heading_2" text:outline-level="2">Web-API</text:h>
      <text:p text:style-name="Text_Body">Der HTTP-Server läuft auf Port 80, erreichbar über 192.168.4.1 (AP) oder http://nixieclockcs.local (Heimnetz via mDNS). POST-Endpunkte erwarten JSON (Content-Type: application/json).</text:p>
      <table:table table:style-name="TableStyle">
        <table:table-column table:style-name="Col4p0"/>
        <table:table-column table:style-name="Col1p8"/>
        <table:table-column table:style-name="Col10p2"/>
        <table:table-row>
          <table:table-cell table:style-name="TH">
            <text:p text:style-name="TableH">Pfad</text:p>
          </table:table-cell>
          <table:table-cell table:style-name="TH">
            <text:p text:style-name="TableH">Methode</text:p>
          </table:table-cell>
          <table:table-cell table:style-name="TH">
            <text:p text:style-name="TableH">Request-Body / Antwort</text:p>
          </table:table-cell>
        </table:table-row>
        <table:table-row>
          <table:table-cell table:style-name="TD">
            <text:p text:style-name="TableP">/</text:p>
          </table:table-cell>
          <table:table-cell table:style-name="TD">
            <text:p text:style-name="TableP">GET</text:p>
          </table:table-cell>
          <table:table-cell table:style-name="TD">
            <text:p text:style-name="TableP">Vollständiges Web-Interface (HTML/CSS/JS eingebettet als PROGMEM)</text:p>
          </table:table-cell>
        </table:table-row>
        <table:table-row>
          <table:table-cell table:style-name="TD_Alt">
            <text:p text:style-name="TableP">/api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time, date, neoBright, animMode, slotIval, slotSpeed, colonOn, colonStatic, colonBright, slot, tubeTest, tubeTestDigit, nightState, ldrVal, wifiSta, ntpSynced}</text:p>
          </table:table-cell>
        </table:table-row>
        <table:table-row>
          <table:table-cell table:style-name="TD">
            <text:p text:style-name="TableP">/api/settime</text:p>
          </table:table-cell>
          <table:table-cell table:style-name="TD">
            <text:p text:style-name="TableP">POST</text:p>
          </table:table-cell>
          <table:table-cell table:style-name="TD">
            <text:p text:style-name="TableP">{"h":H,"m":M,"s":S} + optional {"d":D,"mo":Mo,"y":Y} → RTC schreiben</text:p>
          </table:table-cell>
        </table:table-row>
        <table:table-row>
          <table:table-cell table:style-name="TD_Alt">
            <text:p text:style-name="TableP">/api/neo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val":10..255}  → NeoPixel-Feinwert + NVS</text:p>
          </table:table-cell>
        </table:table-row>
        <table:table-row>
          <table:table-cell table:style-name="TD">
            <text:p text:style-name="TableP">/api/anim</text:p>
          </table:table-cell>
          <table:table-cell table:style-name="TD">
            <text:p text:style-name="TableP">POST</text:p>
          </table:table-cell>
          <table:table-cell table:style-name="TD">
            <text:p text:style-name="TableP">{"mode":0..2}  → Animationsmodus + NVS</text:p>
          </table:table-cell>
        </table:table-row>
        <table:table-row>
          <table:table-cell table:style-name="TD_Alt">
            <text:p text:style-name="TableP">/api/slotinterval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interval":0..4}  → Slot-Intervall (SlotInterval-Enum) + NVS</text:p>
          </table:table-cell>
        </table:table-row>
        <table:table-row>
          <table:table-cell table:style-name="TD">
            <text:p text:style-name="TableP">/api/colon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..100}  → Trennpunkt-Helligkeit + NVS</text:p>
          </table:table-cell>
        </table:table-row>
        <table:table-row>
          <table:table-cell table:style-name="TD_Alt">
            <text:p text:style-name="TableP">/api/colonon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enabled":true|false}  → Dauerhaft an/aus + NVS</text:p>
          </table:table-cell>
        </table:table-row>
        <table:table-row>
          <table:table-cell table:style-name="TD">
            <text:p text:style-name="TableP">/api/colonstatic</text:p>
          </table:table-cell>
          <table:table-cell table:style-name="TD">
            <text:p text:style-name="TableP">POST</text:p>
          </table:table-cell>
          <table:table-cell table:style-name="TD">
            <text:p text:style-name="TableP">{"enabled":true|false}  → Statisch warmweiß + NVS</text:p>
          </table:table-cell>
        </table:table-row>
        <table:table-row>
          <table:table-cell table:style-name="TD_Alt">
            <text:p text:style-name="TableP">/api/slo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(kein Body) → Slot-Machine-Animation sofort starten</text:p>
          </table:table-cell>
        </table:table-row>
        <table:table-row>
          <table:table-cell table:style-name="TD">
            <text:p text:style-name="TableP">/api/slotspeed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20..100}  → Slot-Machine-Rollgeschwindigkeit + NVS</text:p>
          </table:table-cell>
        </table:table-row>
        <table:table-row>
          <table:table-cell table:style-name="TD_Alt">
            <text:p text:style-name="TableP">/api/tubetest/star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(kein Body) → Röhrentest starten (bzw. auf Ziffer 0 zurücksetzen, falls bereits aktiv)</text:p>
          </table:table-cell>
        </table:table-row>
        <table:table-row>
          <table:table-cell table:style-name="TD">
            <text:p text:style-name="TableP">/api/tubetest/stop</text:p>
          </table:table-cell>
          <table:table-cell table:style-name="TD">
            <text:p text:style-name="TableP">POST</text:p>
          </table:table-cell>
          <table:table-cell table:style-name="TD">
            <text:p text:style-name="TableP">(kein Body) → Röhrentest sofort beenden (No-op, falls nicht aktiv)</text:p>
          </table:table-cell>
        </table:table-row>
        <table:table-row>
          <table:table-cell table:style-name="TD_Alt">
            <text:p text:style-name="TableP">/api/softfade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sec, date} — weicher Ziffernwechsel Sekundentakt/Datum-Übergang</text:p>
          </table:table-cell>
        </table:table-row>
        <table:table-row>
          <table:table-cell table:style-name="TD">
            <text:p text:style-name="TableP">/api/softfade</text:p>
          </table:table-cell>
          <table:table-cell table:style-name="TD">
            <text:p text:style-name="TableP">POST</text:p>
          </table:table-cell>
          <table:table-cell table:style-name="TD">
            <text:p text:style-name="TableP">{"sec":true|false,"date":true|false} → weicher Ziffernwechsel + NVS</text:p>
          </table:table-cell>
        </table:table-row>
        <table:table-row>
          <table:table-cell table:style-name="TD_Alt">
            <text:p text:style-name="TableP">/api/nightmode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ntEn, ntFrom, ntTo, ntMode, hvDimPct, ldrEn, ldrThr, ldrVal, state}</text:p>
          </table:table-cell>
        </table:table-row>
        <table:table-row>
          <table:table-cell table:style-name="TD">
            <text:p text:style-name="TableP">/api/nightmode</text:p>
          </table:table-cell>
          <table:table-cell table:style-name="TD">
            <text:p text:style-name="TableP">POST</text:p>
          </table:table-cell>
          <table:table-cell table:style-name="TD">
            <text:p text:style-name="TableP">{ntEn, ntFrom, ntTo, ntMode, hvDimPct, ldrEn, ldrThr} → Nacht-Modus + NVS</text:p>
          </table:table-cell>
        </table:table-row>
        <table:table-row>
          <table:table-cell table:style-name="TD_Alt">
            <text:p text:style-name="TableP">/api/wifi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mode, staSsid, staIp, ntp}</text:p>
          </table:table-cell>
        </table:table-row>
        <table:table-row>
          <table:table-cell table:style-name="TD">
            <text:p text:style-name="TableP">/api/wifi</text:p>
          </table:table-cell>
          <table:table-cell table:style-name="TD">
            <text:p text:style-name="TableP">POST</text:p>
          </table:table-cell>
          <table:table-cell table:style-name="TD">
            <text:p text:style-name="TableP">{"ssid":"…","pass":"…"} → STA verbinden, Neustart</text:p>
          </table:table-cell>
        </table:table-row>
        <table:table-row>
          <table:table-cell table:style-name="TD_Alt">
            <text:p text:style-name="TableP">/api/ir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8 IR-Code-Einträge (je action + code)</text:p>
          </table:table-cell>
        </table:table-row>
        <table:table-row>
          <table:table-cell table:style-name="TD">
            <text:p text:style-name="TableP">/api/ir/learn</text:p>
          </table:table-cell>
          <table:table-cell table:style-name="TD">
            <text:p text:style-name="TableP">POST</text:p>
          </table:table-cell>
          <table:table-cell table:style-name="TD">
            <text:p text:style-name="TableP">{"action":"SET"|"UP"|"DOWN"|"BRIGHTNESS"|"ANIM_NEXT"|"SLOT"|"COLON_TOGGLE"|"DATUM"}</text:p>
          </table:table-cell>
        </table:table-row>
        <table:table-row>
          <table:table-cell table:style-name="TD_Alt">
            <text:p text:style-name="TableP">/api/ir/clear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action":"…"} → IR-Code löschen + NVS</text:p>
          </table:table-cell>
        </table:table-row>
      </table:table>
      <text:p text:style-name="Text_Body"/>
      <text:h text:style-name="Heading_2" text:outline-level="2">NVS-Persistenz</text:h>
      <text:p text:style-name="Text_Body">Alle Einstellungen werden über die Arduino-`Preferences`-Bibliothek im ESP32-NVS-Flash gespeichert (Namespace "nixie"). Beim Start werden sie automatisch geladen.</text:p>
      <table:table table:style-name="TableStyle">
        <table:table-column table:style-name="Col3p0"/>
        <table:table-column table:style-name="Col1p8"/>
        <table:table-column table:style-name="Col2p0"/>
        <table:table-column table:style-name="Col9p2"/>
        <table:table-row>
          <table:table-cell table:style-name="TH">
            <text:p text:style-name="TableH">NVS-Schlüssel</text:p>
          </table:table-cell>
          <table:table-cell table:style-name="TH">
            <text:p text:style-name="TableH">Typ</text:p>
          </table:table-cell>
          <table:table-cell table:style-name="TH">
            <text:p text:style-name="TableH">Default</text:p>
          </table:table-cell>
          <table:table-cell table:style-name="TH">
            <text:p text:style-name="TableH">Inhalt</text:p>
          </table:table-cell>
        </table:table-row>
        <table:table-row>
          <table:table-cell table:style-name="TD">
            <text:p text:style-name="TableP">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3</text:p>
          </table:table-cell>
          <table:table-cell table:style-name="TD">
            <text:p text:style-name="TableP">Helligkeitsstufe (0–3)</text:p>
          </table:table-cell>
        </table:table-row>
        <table:table-row>
          <table:table-cell table:style-name="TD_Alt">
            <text:p text:style-name="TableP">neoBrigh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30</text:p>
          </table:table-cell>
          <table:table-cell table:style-name="TD_Alt">
            <text:p text:style-name="TableP">NeoPixel-Feinwert Hintergrund</text:p>
          </table:table-cell>
        </table:table-row>
        <table:table-row>
          <table:table-cell table:style-name="TD">
            <text:p text:style-name="TableP">colon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80</text:p>
          </table:table-cell>
          <table:table-cell table:style-name="TD">
            <text:p text:style-name="TableP">NeoPixel-Feinwert Trennpunkte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Animationsmodus (0=Rainbow, 1=Statisch, 2=Puls)</text:p>
          </table:table-cell>
        </table:table-row>
        <table:table-row>
          <table:table-cell table:style-name="TD">
            <text:p text:style-name="TableP">slotIval</text:p>
          </table:table-cell>
          <table:table-cell table:style-name="TD">
            <text:p text:style-name="TableP">UInt8</text:p>
          </table:table-cell>
          <table:table-cell table:style-name="TD">
            <text:p text:style-name="TableP">0</text:p>
          </table:table-cell>
          <table:table-cell table:style-name="TD">
            <text:p text:style-name="TableP">Slot-Intervall (SlotInterval-Enum: 0=Aus, 1=10s, 2=1min, 3=15min, 4=1h)</text:p>
          </table:table-cell>
        </table:table-row>
        <table:table-row>
          <table:table-cell table:style-name="TD_Alt">
            <text:p text:style-name="TableP">slotSpeed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100</text:p>
          </table:table-cell>
          <table:table-cell table:style-name="TD_Alt">
            <text:p text:style-name="TableP">Slot-Machine-Rollgeschwindigkeit (20–100 %)</text:p>
          </table:table-cell>
        </table:table-row>
        <table:table-row>
          <table:table-cell table:style-name="TD">
            <text:p text:style-name="TableP">sfSecE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Weicher Ziffernwechsel Sekundentakt aktiv</text:p>
          </table:table-cell>
        </table:table-row>
        <table:table-row>
          <table:table-cell table:style-name="TD_Alt">
            <text:p text:style-name="TableP">sfDate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Weicher Ziffernwechsel Zeit/Datum aktiv</text:p>
          </table:table-cell>
        </table:table-row>
        <table:table-row>
          <table:table-cell table:style-name="TD">
            <text:p text:style-name="TableP">colonO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Trennpunkte dauerhaft an</text:p>
          </table:table-cell>
        </table:table-row>
        <table:table-row>
          <table:table-cell table:style-name="TD_Alt">
            <text:p text:style-name="TableP">colonStatic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Trennpunkte statisch warmweiß</text:p>
          </table:table-cell>
        </table:table-row>
        <table:table-row>
          <table:table-cell table:style-name="TD">
            <text:p text:style-name="TableP">ntE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Nacht-Modus Zeitbereich aktiv</text:p>
          </table:table-cell>
        </table:table-row>
        <table:table-row>
          <table:table-cell table:style-name="TD_Alt">
            <text:p text:style-name="TableP">ntFrom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23</text:p>
          </table:table-cell>
          <table:table-cell table:style-name="TD_Alt">
            <text:p text:style-name="TableP">Nacht-Modus Startzeit (Stunde 0–23)</text:p>
          </table:table-cell>
        </table:table-row>
        <table:table-row>
          <table:table-cell table:style-name="TD">
            <text:p text:style-name="TableP">ntTo</text:p>
          </table:table-cell>
          <table:table-cell table:style-name="TD">
            <text:p text:style-name="TableP">UInt8</text:p>
          </table:table-cell>
          <table:table-cell table:style-name="TD">
            <text:p text:style-name="TableP">7</text:p>
          </table:table-cell>
          <table:table-cell table:style-name="TD">
            <text:p text:style-name="TableP">Nacht-Modus Endzeit (Stunde 0–23)</text:p>
          </table:table-cell>
        </table:table-row>
        <table:table-row>
          <table:table-cell table:style-name="TD_Alt">
            <text:p text:style-name="TableP">nt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Nacht-Modus Typ (0=Gedimmt, 1=Dunkel)</text:p>
          </table:table-cell>
        </table:table-row>
        <table:table-row>
          <table:table-cell table:style-name="TD">
            <text:p text:style-name="TableP">hvDimPct</text:p>
          </table:table-cell>
          <table:table-cell table:style-name="TD">
            <text:p text:style-name="TableP">UInt8</text:p>
          </table:table-cell>
          <table:table-cell table:style-name="TD">
            <text:p text:style-name="TableP">25</text:p>
          </table:table-cell>
          <table:table-cell table:style-name="TD">
            <text:p text:style-name="TableP">Röhren-Dimm-Helligkeit (2–60 %)</text:p>
          </table:table-cell>
        </table:table-row>
        <table:table-row>
          <table:table-cell table:style-name="TD_Alt">
            <text:p text:style-name="TableP">ldr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Lichtsensor-Steuerung aktiv</text:p>
          </table:table-cell>
        </table:table-row>
        <table:table-row>
          <table:table-cell table:style-name="TD">
            <text:p text:style-name="TableP">ldrThr</text:p>
          </table:table-cell>
          <table:table-cell table:style-name="TD">
            <text:p text:style-name="TableP">UInt16</text:p>
          </table:table-cell>
          <table:table-cell table:style-name="TD">
            <text:p text:style-name="TableP">512</text:p>
          </table:table-cell>
          <table:table-cell table:style-name="TD">
            <text:p text:style-name="TableP">LDR-Schwellwert ADC (0–4095)</text:p>
          </table:table-cell>
        </table:table-row>
        <table:table-row>
          <table:table-cell table:style-name="TD_Alt">
            <text:p text:style-name="TableP">wifiSsid</text:p>
          </table:table-cell>
          <table:table-cell table:style-name="TD_Alt">
            <text:p text:style-name="TableP">String</text:p>
          </table:table-cell>
          <table:table-cell table:style-name="TD_Alt">
            <text:p text:style-name="TableP">""</text:p>
          </table:table-cell>
          <table:table-cell table:style-name="TD_Alt">
            <text:p text:style-name="TableP">Heimnetz SSID</text:p>
          </table:table-cell>
        </table:table-row>
        <table:table-row>
          <table:table-cell table:style-name="TD">
            <text:p text:style-name="TableP">wifiPass</text:p>
          </table:table-cell>
          <table:table-cell table:style-name="TD">
            <text:p text:style-name="TableP">String</text:p>
          </table:table-cell>
          <table:table-cell table:style-name="TD">
            <text:p text:style-name="TableP">""</text:p>
          </table:table-cell>
          <table:table-cell table:style-name="TD">
            <text:p text:style-name="TableP">Heimnetz Passwort</text:p>
          </table:table-cell>
        </table:table-row>
        <table:table-row>
          <table:table-cell table:style-name="TD_Alt">
            <text:p text:style-name="TableP">ir_SE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SET</text:p>
          </table:table-cell>
        </table:table-row>
        <table:table-row>
          <table:table-cell table:style-name="TD">
            <text:p text:style-name="TableP">ir_UP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UP</text:p>
          </table:table-cell>
        </table:table-row>
        <table:table-row>
          <table:table-cell table:style-name="TD_Alt">
            <text:p text:style-name="TableP">ir_DOWN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DOWN</text:p>
          </table:table-cell>
        </table:table-row>
        <table:table-row>
          <table:table-cell table:style-name="TD">
            <text:p text:style-name="TableP">ir_BRIGHTNESS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BRIGHTNESS</text:p>
          </table:table-cell>
        </table:table-row>
        <table:table-row>
          <table:table-cell table:style-name="TD_Alt">
            <text:p text:style-name="TableP">ir_ANIM_NEX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ANIM_NEXT</text:p>
          </table:table-cell>
        </table:table-row>
        <table:table-row>
          <table:table-cell table:style-name="TD">
            <text:p text:style-name="TableP">ir_SLO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SLOT</text:p>
          </table:table-cell>
        </table:table-row>
        <table:table-row>
          <table:table-cell table:style-name="TD_Alt">
            <text:p text:style-name="TableP">ir_COLTOGGLE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COLON_TOGGLE</text:p>
          </table:table-cell>
        </table:table-row>
        <table:table-row>
          <table:table-cell table:style-name="TD">
            <text:p text:style-name="TableP">ir_DATE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DATE (Datumsanzeige)</text:p>
          </table:table-cell>
        </table:table-row>
      </table:table>
      <text:p text:style-name="Text_Body"/>
      <text:p text:style-name="PageBreak"/>
      <text:h text:style-name="Heading_1" text:outline-level="1">Entwickler-Workflow</text:h>
      <text:h text:style-name="Heading_2" text:outline-level="2">Arduino IDE einrichten</text:h>
      <text:p text:style-name="Text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Body">Dann: Werkzeuge → Board → Boardverwalter → «esp32» suchen → Paket von Espressif Systems installieren (Version 3.x). Board auswählen: ESP32S3 Dev Module.</text:p>
      <text:h text:style-name="Heading_2" text:outline-level="2">Bibliotheken installieren</text:h>
      <text:p text:style-name="Text_Body">Alle Bibliotheken über den Arduino Library Manager installieren (Werkzeuge → Bibliotheken verwalten):</text:p>
      <table:table table:style-name="TableStyle">
        <table:table-column table:style-name="Col7p0"/>
        <table:table-column table:style-name="Col9p0"/>
        <table:table-row>
          <table:table-cell table:style-name="TH">
            <text:p text:style-name="TableH">Bibliothek</text:p>
          </table:table-cell>
          <table:table-cell table:style-name="TH">
            <text:p text:style-name="TableH">Suchbegriff im Library Manager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 NeoPixel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Rtc by Makuna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AsyncTCP (me-no-dev)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ESPAsyncWebServer (me-no-dev)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ArduinoJson (v6.x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IRremoteESP8266</text:p>
          </table:table-cell>
        </table:table-row>
      </table:table>
      <text:p text:style-name="Text_Body"/>
      <text:p text:style-name="Note">⚠ ArduinoJson: Explizit Version 6.x wählen — Version 7 ist API-inkompatibel.</text:p>
      <text:h text:style-name="Heading_2" text:outline-level="2">ESP32-S3 USB-Einstellungen — kritisch!</text:h>
      <text:p text:style-name="Text_Body">Das Logic Board verwendet die native USB-Schnittstelle des ESP32-S3 (USB-OTG, GPIO19/20) — es gibt keinen separaten USB-UART-Chip. Der ROM-Bootloader des ESP32-S3 meldet sich ab Werk als USB-CDC-Port, sodass das erste Flashen problemlos funktioniert.</text:p>
      <text:p text:style-name="Text_Body">Die Gefahr liegt im zweiten Schritt: Wird die Firmware mit der Einstellung «USB CDC On Boot: Disabled» kompiliert und geflasht, schaltet die laufende Firmware das CDC ab. Beim nächsten Start erscheint kein COM-Port mehr — die Arduino IDE kann keinen automatischen Reset in den Bootloader-Modus auslösen. Da der BOOT-Taster SW5 nicht bestückt ist, gibt es keinen manuellen Ausweg: der ESP32-S3 ist danach über USB nicht mehr programmierbar.</text:p>
      <text:p text:style-name="Note">⚠ SW5 (BOOT) ist nicht bestückt. Einmal mit «USB CDC On Boot: Disabled» geflasht bedeutet: nie wieder über USB flashbar — bis GPIO0 über einen Lötpunkt manuell auf GND gezogen wird.</text:p>
      <text:p text:style-name="Text_Body">Folgende Einstellungen müssen unter Werkzeuge vor jedem Kompilieren und Hochladen gesetzt sein:</text:p>
      <table:table table:style-name="TableStyle">
        <table:table-column table:style-name="Col4p0"/>
        <table:table-column table:style-name="Col4p5"/>
        <table:table-column table:style-name="Col7p5"/>
        <table:table-row>
          <table:table-cell table:style-name="TH">
            <text:p text:style-name="TableH">Einstellung</text:p>
          </table:table-cell>
          <table:table-cell table:style-name="TH">
            <text:p text:style-name="TableH">Wert</text:p>
          </table:table-cell>
          <table:table-cell table:style-name="TH">
            <text:p text:style-name="TableH">Bemerkung</text:p>
          </table:table-cell>
        </table:table-row>
        <table:table-row>
          <table:table-cell table:style-name="TD">
            <text:p text:style-name="TableP">Board</text:p>
          </table:table-cell>
          <table:table-cell table:style-name="TD">
            <text:p text:style-name="TableP">ESP32S3 Dev Module</text:p>
          </table:table-cell>
          <table:table-cell table:style-name="TD">
            <text:p text:style-name="TableP">Espressif ESP32-S3-Paket v3.x</text:p>
          </table:table-cell>
        </table:table-row>
        <table:table-row>
          <table:table-cell table:style-name="TD_Alt">
            <text:p text:style-name="TableP">USB Mode</text:p>
          </table:table-cell>
          <table:table-cell table:style-name="TD_Alt">
            <text:p text:style-name="TableP">Hardware CDC and JTAG</text:p>
          </table:table-cell>
          <table:table-cell table:style-name="TD_Alt">
            <text:p text:style-name="TableP">Natives USB des ESP32-S3 aktivieren</text:p>
          </table:table-cell>
        </table:table-row>
        <table:table-row>
          <table:table-cell table:style-name="TD">
            <text:p text:style-name="TableP">Upload Mode</text:p>
          </table:table-cell>
          <table:table-cell table:style-name="TD">
            <text:p text:style-name="TableP">UART0 / Hardware CDC</text:p>
          </table:table-cell>
          <table:table-cell table:style-name="TD">
            <text:p text:style-name="TableP">Upload über dieselbe USB-Buchse</text:p>
          </table:table-cell>
        </table:table-row>
        <table:table-row>
          <table:table-cell table:style-name="TD_Alt">
            <text:p text:style-name="TableP">USB CDC On Boot</text:p>
          </table:table-cell>
          <table:table-cell table:style-name="TD_Alt">
            <text:p text:style-name="TableP">Enabled</text:p>
          </table:table-cell>
          <table:table-cell table:style-name="TD_Alt">
            <text:p text:style-name="TableP">KRITISCH: Disabled sperrt USB-Zugang dauerhaft (SW5 nicht bestückt)</text:p>
          </table:table-cell>
        </table:table-row>
        <table:table-row>
          <table:table-cell table:style-name="TD">
            <text:p text:style-name="TableP">USB DFU On Boot</text:p>
          </table:table-cell>
          <table:table-cell table:style-name="TD">
            <text:p text:style-name="TableP">Disabled</text:p>
          </table:table-cell>
          <table:table-cell table:style-name="TD">
            <text:p text:style-name="TableP">Nicht benötigt</text:p>
          </table:table-cell>
        </table:table-row>
        <table:table-row>
          <table:table-cell table:style-name="TD_Alt">
            <text:p text:style-name="TableP">Flash Size</text:p>
          </table:table-cell>
          <table:table-cell table:style-name="TD_Alt">
            <text:p text:style-name="TableP">4 MB (32 Mb)</text:p>
          </table:table-cell>
          <table:table-cell table:style-name="TD_Alt">
            <text:p text:style-name="TableP">Passend zum ESP32-S3-WROOM-1</text:p>
          </table:table-cell>
        </table:table-row>
        <table:table-row>
          <table:table-cell table:style-name="TD">
            <text:p text:style-name="TableP">Upload Speed</text:p>
          </table:table-cell>
          <table:table-cell table:style-name="TD">
            <text:p text:style-name="TableP">921600</text:p>
          </table:table-cell>
          <table:table-cell table:style-name="TD">
            <text:p text:style-name="TableP"/>
          </table:table-cell>
        </table:table-row>
      </table:table>
      <text:p text:style-name="Text_Body"/>
      <text:h text:style-name="Heading_2" text:outline-level="2">Firmware flashen</text:h>
      <text:p text:style-name="Text_Body">1. Micro-USB-Kabel am Logic Board J2 anschließen (5 V + Datenleitungen).</text:p>
      <text:p text:style-name="Text_Body">2. Sicherstellen, dass alle USB-Einstellungen korrekt gesetzt sind (siehe Abschnitt oben) — insbesondere «USB CDC On Boot: Enabled».</text:p>
      <text:p text:style-name="Text_Body">3. Sketch → Hochladen (Strg+U). Die IDE erkennt den COM-Port automatisch und löst den Reset in den Bootloader-Modus aus.</text:p>
      <text:h text:style-name="Heading_2" text:outline-level="2">Serial Monitor / Debugging</text:h>
      <text:p text:style-name="Text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2" text:outline-level="2">Häufige Probleme</text:h>
      <table:table table:style-name="TableStyle">
        <table:table-column table:style-name="Col4p5"/>
        <table:table-column table:style-name="Col4p5"/>
        <table:table-column table:style-name="Col7p0"/>
        <table:table-row>
          <table:table-cell table:style-name="TH">
            <text:p text:style-name="TableH">Symptom</text:p>
          </table:table-cell>
          <table:table-cell table:style-name="TH">
            <text:p text:style-name="TableH">Ursache</text:p>
          </table:table-cell>
          <table:table-cell table:style-name="TH">
            <text:p text:style-name="TableH">Lösung</text:p>
          </table:table-cell>
        </table:table-row>
        <table:table-row>
          <table:table-cell table:style-name="TD">
            <text:p text:style-name="TableP">Röhren leuchten nicht</text:p>
          </table:table-cell>
          <table:table-cell table:style-name="TD">
            <text:p text:style-name="TableP">HV-MOD liefert keine Spannung</text:p>
          </table:table-cell>
          <table:table-cell table:style-name="TD">
            <text:p text:style-name="TableP">5-V-Versorgung und HV-MOD prüfen; Spannungsmessung an J4</text:p>
          </table:table-cell>
        </table:table-row>
        <table:table-row>
          <table:table-cell table:style-name="TD_Alt">
            <text:p text:style-name="TableP">Ghosting / Doppelziffern</text:p>
          </table:table-cell>
          <table:table-cell table:style-name="TD_Alt">
            <text:p text:style-name="TableP">I²C-Fehler, MCP nicht antwortend</text:p>
          </table:table-cell>
          <table:table-cell table:style-name="TD_Alt">
            <text:p text:style-name="TableP">I²C-Bus prüfen (Pull-ups R65–R70), Serial Monitor auf Fehlermeldungen</text:p>
          </table:table-cell>
        </table:table-row>
        <table:table-row>
          <table:table-cell table:style-name="TD">
            <text:p text:style-name="TableP">Web-UI nicht erreichbar</text:p>
          </table:table-cell>
          <table:table-cell table:style-name="TD">
            <text:p text:style-name="TableP">WiFi AP nicht gestartet</text:p>
          </table:table-cell>
          <table:table-cell table:style-name="TD">
            <text:p text:style-name="TableP">Serial Monitor prüfen; auf 192.168.4.1 verbinden</text:p>
          </table:table-cell>
        </table:table-row>
        <table:table-row>
          <table:table-cell table:style-name="TD_Alt">
            <text:p text:style-name="TableP">Uhrzeit falsch nach Reset</text:p>
          </table:table-cell>
          <table:table-cell table:style-name="TD_Alt">
            <text:p text:style-name="TableP">RTC leer / Batterie schwach</text:p>
          </table:table-cell>
          <table:table-cell table:style-name="TD_Alt">
            <text:p text:style-name="TableP">Zeit über Web-UI stellen; CR2032 BT1 prüfen</text:p>
          </table:table-cell>
        </table:table-row>
        <table:table-row>
          <table:table-cell table:style-name="TD">
            <text:p text:style-name="TableP">Kompilierungsfehler JSON</text:p>
          </table:table-cell>
          <table:table-cell table:style-name="TD">
            <text:p text:style-name="TableP">ArduinoJson v7 installiert</text:p>
          </table:table-cell>
          <table:table-cell table:style-name="TD">
            <text:p text:style-name="TableP">ArduinoJson auf v6.x downgraden</text:p>
          </table:table-cell>
        </table:table-row>
        <table:table-row>
          <table:table-cell table:style-name="TD_Alt">
            <text:p text:style-name="TableP">IR-Fernbedienung reagiert nicht</text:p>
          </table:table-cell>
          <table:table-cell table:style-name="TD_Alt">
            <text:p text:style-name="TableP">Code noch nicht angelernt</text:p>
          </table:table-cell>
          <table:table-cell table:style-name="TD_Alt">
            <text:p text:style-name="TableP">Im Web-UI unter IR-Fernbedienung Codes anlernen</text:p>
          </table:table-cell>
        </table:table-row>
        <table:table-row>
          <table:table-cell table:style-name="TD">
            <text:p text:style-name="TableP">ESP32 nach erstem Flash nicht mehr erreichbar, kein COM-Port</text:p>
          </table:table-cell>
          <table:table-cell table:style-name="TD">
            <text:p text:style-name="TableP">Mit «USB CDC On Boot: Disabled» kompiliert → Firmware schaltet CDC ab</text:p>
          </table:table-cell>
          <table:table-cell table:style-name="TD">
            <text:p text:style-name="TableP">GPIO0-Testpunkt auf GND halten, USB neu einstecken → ROM-Bootloader → mit korrekten Einstellungen neu flashen</text:p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office:version="1.3">
  <office:styles>
    <!-- Seitenlayout A4 -->
    <style:style style:name="PageLayout" style:family="page-layout">
      <style:page-layout-properties fo:page-width="21cm" fo:page-height="29.7cm" fo:margin-top="2.5cm" fo:margin-bottom="2.5cm" fo:margin-left="2.5cm" fo:margin-right="2.5cm"/>
    </style:style>
    <!-- Absatzstile -->
    <style:style style:name="Title" style:family="paragraph">
      <style:paragraph-properties fo:text-align="center" fo:margin-top="6cm" fo:margin-bottom="0.5cm"/>
      <style:text-properties fo:font-size="28pt" fo:font-weight="bold" fo:color="#1a2440"/>
    </style:style>
    <style:style style:name="Subtitle" style:family="paragraph">
      <style:paragraph-properties fo:text-align="center" fo:margin-bottom="0.4cm"/>
      <style:text-properties fo:font-size="14pt" fo:color="#444444"/>
    </style:style>
    <style:style style:name="TitleMeta" style:family="paragraph">
      <style:paragraph-properties fo:text-align="center" fo:margin-bottom="0.2cm"/>
      <style:text-properties fo:font-size="11pt" fo:color="#666666"/>
    </style:style>
    <style:style style:name="Heading_1" style:family="paragraph">
      <style:paragraph-properties fo:margin-top="0.8cm" fo:margin-bottom="0.4cm" fo:keep-with-next="always"/>
      <style:text-properties fo:font-size="18pt" fo:font-weight="bold" fo:color="#1a2440"/>
    </style:style>
    <style:style style:name="Heading_2" style:family="paragraph">
      <style:paragraph-properties fo:margin-top="0.6cm" fo:margin-bottom="0.3cm" fo:keep-with-next="always"/>
      <style:text-properties fo:font-size="14pt" fo:font-weight="bold" fo:color="#1a3060"/>
    </style:style>
    <style:style style:name="Heading_3" style:family="paragraph">
      <style:paragraph-properties fo:margin-top="0.4cm" fo:margin-bottom="0.2cm" fo:keep-with-next="always"/>
      <style:text-properties fo:font-size="12pt" fo:font-weight="bold" fo:color="#2a4080"/>
    </style:style>
    <style:style style:name="Text_Body" style:family="paragraph">
      <style:paragraph-properties fo:margin-top="0.1cm" fo:margin-bottom="0.2cm" fo:text-align="justify" fo:line-height="140%"/>
      <style:text-properties fo:font-size="10.5pt"/>
    </style:style>
    <style:style style:name="Caption" style:family="paragraph">
      <style:paragraph-properties fo:text-align="center" fo:margin-bottom="0.3cm" fo:margin-top="0.1cm"/>
      <style:text-properties fo:font-size="9pt" fo:color="#555555"/>
    </style:style>
    <style:style style:name="Code" style:family="paragraph">
      <style:paragraph-properties fo:margin-left="1cm" fo:margin-top="0.05cm" fo:margin-bottom="0.05cm" fo:background-color="#f3f3f3"/>
      <style:text-properties fo:font-family="Liberation Mono" fo:font-size="9pt" fo:color="#1a1a1a"/>
    </style:style>
    <style:style style:name="Note" style:family="paragraph">
      <style:paragraph-properties fo:margin-top="0.2cm" fo:margin-bottom="0.2cm" fo:margin-left="0.5cm" fo:background-color="#fff8e0" fo:border="0.5pt solid #c8a000" fo:padding="0.2cm"/>
      <style:text-properties fo:font-size="10pt" fo:color="#5a4000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font-size="10pt" fo:font-weight="bold" fo:color="#ffffff"/>
    </style:style>
    <style:style style:name="TableP" style:family="paragraph">
      <style:text-properties fo:font-size="9.5pt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cm"/>
    </style:style>
  </office:styles>
  <office:master-styles>
    <style:master-page style:name="Standard" style:page-layout-name="PageLayout">
      <style:footer>
        <text:p text:style-name="TitleMeta">
        Nixie Clock Ultra — Systemdokumentation
        <text:tab/><text:tab/><text:tab/>
        Seite <text:page-number/>
      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Systemdokumentation</dc:title>
    <dc:creator>broed digital media</dc:creator>
    <dc:date>2026-06-29</dc:date>
    <meta:generator>gen_sysdoc.py</meta:generator>
  </office:meta>
</office:document-meta>
</file>