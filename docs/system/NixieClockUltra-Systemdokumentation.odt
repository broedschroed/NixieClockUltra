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ic_sch.png" manifest:media-type="image/png"/>
  <manifest:file-entry manifest:full-path="Pictures/logic_pcb.png" manifest:media-type="image/png"/>
  <manifest:file-entry manifest:full-path="Pictures/nixie_sch.png" manifest:media-type="image/png"/>
  <manifest:file-entry manifest:full-path="Pictures/nixie_p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!-- Tabellen-Zellenstile -->
    <style:style style:name="TableStyle" style:family="table">
      <style:table-properties style:width="16cm" fo:margin-bottom="0.4cm" fo:margin-top="0.2cm"/>
    </style:style>
    <style:style style:name="TH" style:family="table-cell">
      <style:table-cell-properties fo:background-color="#1a3060" fo:padding-top="0.12cm" fo:padding-bottom="0.12cm" fo:padding-left="0.15cm" fo:padding-right="0.15cm" fo:border="0.5pt solid #8899aa"/>
    </style:style>
    <style:style style:name="TD" style:family="table-cell">
      <style:table-cell-properties fo:background-color="#ffffff" fo:padding-top="0.1cm" fo:padding-bottom="0.1cm" fo:padding-left="0.12cm" fo:padding-right="0.12cm" fo:border="0.3pt solid #cccccc"/>
    </style:style>
    <style:style style:name="TD_Alt" style:family="table-cell">
      <style:table-cell-properties fo:background-color="#eef2fa" fo:padding-top="0.1cm" fo:padding-bottom="0.1cm" fo:padding-left="0.12cm" fo:padding-right="0.12cm" fo:border="0.3pt solid #cccccc"/>
    </style:style>
    <style:style style:name="Col1p0" style:family="table-column">
      <style:table-column-properties style:column-width="1.0cm"/>
    </style:style>
    <style:style style:name="Col1p2" style:family="table-column">
      <style:table-column-properties style:column-width="1.2cm"/>
    </style:style>
    <style:style style:name="Col1p5" style:family="table-column">
      <style:table-column-properties style:column-width="1.5cm"/>
    </style:style>
    <style:style style:name="Col1p8" style:family="table-column">
      <style:table-column-properties style:column-width="1.8cm"/>
    </style:style>
    <style:style style:name="Col2p0" style:family="table-column">
      <style:table-column-properties style:column-width="2.0cm"/>
    </style:style>
    <style:style style:name="Col2p5" style:family="table-column">
      <style:table-column-properties style:column-width="2.5cm"/>
    </style:style>
    <style:style style:name="Col3p0" style:family="table-column">
      <style:table-column-properties style:column-width="3.0cm"/>
    </style:style>
    <style:style style:name="Col3p2" style:family="table-column">
      <style:table-column-properties style:column-width="3.2cm"/>
    </style:style>
    <style:style style:name="Col3p5" style:family="table-column">
      <style:table-column-properties style:column-width="3.5cm"/>
    </style:style>
    <style:style style:name="Col4p0" style:family="table-column">
      <style:table-column-properties style:column-width="4.0cm"/>
    </style:style>
    <style:style style:name="Col4p5" style:family="table-column">
      <style:table-column-properties style:column-width="4.5cm"/>
    </style:style>
    <style:style style:name="Col6p0" style:family="table-column">
      <style:table-column-properties style:column-width="6.0cm"/>
    </style:style>
    <style:style style:name="Col7p0" style:family="table-column">
      <style:table-column-properties style:column-width="7.0cm"/>
    </style:style>
    <style:style style:name="Col7p1" style:family="table-column">
      <style:table-column-properties style:column-width="7.1cm"/>
    </style:style>
    <style:style style:name="Col7p5" style:family="table-column">
      <style:table-column-properties style:column-width="7.5cm"/>
    </style:style>
    <style:style style:name="Col8p2" style:family="table-column">
      <style:table-column-properties style:column-width="8.2cm"/>
    </style:style>
    <style:style style:name="Col8p8" style:family="table-column">
      <style:table-column-properties style:column-width="8.8cm"/>
    </style:style>
    <style:style style:name="Col9p0" style:family="table-column">
      <style:table-column-properties style:column-width="9.0cm"/>
    </style:style>
    <style:style style:name="Col9p2" style:family="table-column">
      <style:table-column-properties style:column-width="9.2cm"/>
    </style:style>
    <style:style style:name="Col9p5" style:family="table-column">
      <style:table-column-properties style:column-width="9.5cm"/>
    </style:style>
    <style:style style:name="Col10p0" style:family="table-column">
      <style:table-column-properties style:column-width="10.0cm"/>
    </style:style>
    <style:style style:name="Col10p2" style:family="table-column">
      <style:table-column-properties style:column-width="10.2cm"/>
    </style:style>
    <style:style style:name="Col10p3" style:family="table-column">
      <style:table-column-properties style:column-width="10.3cm"/>
    </style:style>
    <style:style style:name="Col11p5" style:family="table-column">
      <style:table-column-properties style:column-width="11.5cm"/>
    </style:style>
  </office:automatic-styles>
  <office:body>
    <office:text>
      <text:p text:style-name="Title">Nixie Clock Ultra</text:p>
      <text:p text:style-name="Subtitle">Systemdokumentation</text:p>
      <text:p text:style-name="Text_Body"/>
      <text:p text:style-name="Text_Body"/>
      <text:p text:style-name="TitleMeta">Version 2.0 · ESP32-S3 · 6 × IN-12A Nixie</text:p>
      <text:p text:style-name="TitleMeta">MCP23017 Direct Drive · DS1302 RTC · WS2812B NeoPixel</text:p>
      <text:p text:style-name="Text_Body"/>
      <text:p text:style-name="TitleMeta">Stand: Juni 2026</text:p>
      <text:p text:style-name="TitleMeta">Projekt: broed digital media</text:p>
      <text:p text:style-name="PageBreak"/>
      <text:h text:style-name="Heading_1" text:outline-level="1">Systemübersicht</text:h>
      <text:p text:style-name="Text_Body">Die Nixie Clock Ultra ist eine Röhrenuhr auf Basis des ESP32-S3 Mikrocontrollers mit 6 IN-12A Nixie-Röhren. Das System besteht aus zwei Platinen: dem Logic Board, das den Mikrocontroller, die Echtzeituhr, die Hochspannungserzeugung und alle Schnittstellen beherbergt, sowie dem Nixie Display Board, das die Anzeigeelektronik mit vier MCP23017 I²C-Port-Expandern, 60 NPN-Transistoren und den WS2812B RGB-LEDs enthält.</text:p>
      <text:p text:style-name="Text_Body">Die Röhren werden ohne Multiplexing direkt angesteuert — jede der 60 Kathoden besitzt einen eigenen SMBTA42-Hochvolt-Transistor. Ghosting-Effekte sind dadurch vollständig eliminiert.</text:p>
      <text:p text:style-name="Text_Body"/>
      <text:h text:style-name="Heading_2" text:outline-level="2">Zweiplatinenaufbau</text:h>
      <table:table table:style-name="TableStyle">
        <table:table-column table:style-name="Col3p2"/>
        <table:table-column table:style-name="Col4p5"/>
        <table:table-column table:style-name="Col1p2"/>
        <table:table-column table:style-name="Col7p1"/>
        <table:table-row>
          <table:table-cell table:style-name="TH">
            <text:p text:style-name="TableH">Platine</text:p>
          </table:table-cell>
          <table:table-cell table:style-name="TH">
            <text:p text:style-name="TableH">KiCAD-Projekt</text:p>
          </table:table-cell>
          <table:table-cell table:style-name="TH">
            <text:p text:style-name="TableH">Rev.</text:p>
          </table:table-cell>
          <table:table-cell table:style-name="TH">
            <text:p text:style-name="TableH">Hauptfunktion</text:p>
          </table:table-cell>
        </table:table-row>
        <table:table-row>
          <table:table-cell table:style-name="TD">
            <text:p text:style-name="TableP">Logic Board</text:p>
          </table:table-cell>
          <table:table-cell table:style-name="TD">
            <text:p text:style-name="TableP">nixieclocklogic_V2</text:p>
          </table:table-cell>
          <table:table-cell table:style-name="TD">
            <text:p text:style-name="TableP">0.9</text:p>
          </table:table-cell>
          <table:table-cell table:style-name="TD">
            <text:p text:style-name="TableP">ESP32-S3, DS1302 RTC, HV-MOD, Taster, IR, USB</text:p>
          </table:table-cell>
        </table:table-row>
        <table:table-row>
          <table:table-cell table:style-name="TD_Alt">
            <text:p text:style-name="TableP">Nixie Display Board</text:p>
          </table:table-cell>
          <table:table-cell table:style-name="TD_Alt">
            <text:p text:style-name="TableP">nixieclockin12_V2</text:p>
          </table:table-cell>
          <table:table-cell table:style-name="TD_Alt">
            <text:p text:style-name="TableP">2.01</text:p>
          </table:table-cell>
          <table:table-cell table:style-name="TD_Alt">
            <text:p text:style-name="TableP">4× MCP23017, 60× SMBTA42, 6× IN-12A, WS2812B</text:p>
          </table:table-cell>
        </table:table-row>
      </table:table>
      <text:p text:style-name="Text_Body"/>
      <text:h text:style-name="Heading_2" text:outline-level="2">Inter-Board-Steckverbinder</text:h>
      <text:p text:style-name="Text_Body">Die beiden Platinen sind über zwei Steckverbinder verbunden. J3 (Logic Board) ↔ J1 (Display Board) führt Logik- und Steuersignale, J4 (Logic Board) ↔ J2 (Display Board) die Hochspannungsversorgung.</text:p>
      <table:table table:style-name="TableStyle">
        <table:table-column table:style-name="Col3p0"/>
        <table:table-column table:style-name="Col1p5"/>
        <table:table-column table:style-name="Col11p5"/>
        <table:table-row>
          <table:table-cell table:style-name="TH">
            <text:p text:style-name="TableH">Steckverbinder</text:p>
          </table:table-cell>
          <table:table-cell table:style-name="TH">
            <text:p text:style-name="TableH">Polig</text:p>
          </table:table-cell>
          <table:table-cell table:style-name="TH">
            <text:p text:style-name="TableH">Signale</text:p>
          </table:table-cell>
        </table:table-row>
        <table:table-row>
          <table:table-cell table:style-name="TD">
            <text:p text:style-name="TableP">J3 ↔ J1  (Logic)</text:p>
          </table:table-cell>
          <table:table-cell table:style-name="TD">
            <text:p text:style-name="TableP">8</text:p>
          </table:table-cell>
          <table:table-cell table:style-name="TD">
            <text:p text:style-name="TableP">VCC 3,3V, GND, SDA (GPIO8), SCL (GPIO9), NEO-Daten (GPIO21)</text:p>
          </table:table-cell>
        </table:table-row>
        <table:table-row>
          <table:table-cell table:style-name="TD_Alt">
            <text:p text:style-name="TableP">J4 ↔ J2  (HV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HV ~170V DC (×2), HVgnd (×2)</text:p>
          </table:table-cell>
        </table:table-row>
      </table:table>
      <text:p text:style-name="Text_Body"/>
      <text:p text:style-name="PageBreak"/>
      <text:h text:style-name="Heading_1" text:outline-level="1">PCB 1 – Logic Board</text:h>
      <text:p text:style-name="Text_Body">Das Logic Board (Rev 0.9, 2026-05-07) trägt alle zentralen Komponenten des Systems: den ESP32-S3-WROOM-1 Mikrocontroller, die DS1302 Echtzeituhr mit CR2032-Backup-Batterie, das HV-Boost-Modul, den AMS1117-3.3 LDO-Regler, den VS1838B IR-Empfänger, vier Taster sowie den Micro-USB-Anschluss mit ESD-Schutz.</text:p>
      <text:h text:style-name="Heading_2" text:outline-level="2">Schaltplan</text:h>
      <text:p text:style-name="Text_Body"><draw:frame draw:name="logic_sch" draw:style-name="Graphics" svg:width="15.5cm" svg:height="11.0cm" text:anchor-type="paragraph" draw:z-index="0"><draw:image xlink:href="Pictures/logic_sch.png" xlink:type="simple" xlink:show="embed" xlink:actuate="onLoad"/></draw:frame></text:p>
      <text:p text:style-name="Caption"><text:span text:style-name="Italic">Abb. 1 – Logic Board Schaltplan (nixieclocklogic_V2-SCH.pdf)</text:span></text:p>
      <text:p text:style-name="Text_Body"/>
      <text:h text:style-name="Heading_2" text:outline-level="2">PCB-Layout</text:h>
      <text:p text:style-name="Text_Body"><draw:frame draw:name="logic_pcb" draw:style-name="Graphics" svg:width="15.5cm" svg:height="11.0cm" text:anchor-type="paragraph" draw:z-index="0"><draw:image xlink:href="Pictures/logic_pcb.png" xlink:type="simple" xlink:show="embed" xlink:actuate="onLoad"/></draw:frame></text:p>
      <text:p text:style-name="Caption"><text:span text:style-name="Italic">Abb. 2 – Logic Board PCB-Layout (nixieclocklogic_V2_BPHL.pdf)</text:span></text:p>
      <text:p text:style-name="Text_Body"/>
      <text:h text:style-name="Heading_2" text:outline-level="2">Komponenten</text:h>
      <table:table table:style-name="TableStyle">
        <table:table-column table:style-name="Col1p2"/>
        <table:table-column table:style-name="Col3p5"/>
        <table:table-column table:style-name="Col2p5"/>
        <table:table-column table:style-name="Col8p8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Gehäuse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ESP32-S3-WROOM-1</text:p>
          </table:table-cell>
          <table:table-cell table:style-name="TD">
            <text:p text:style-name="TableP">Modul</text:p>
          </table:table-cell>
          <table:table-cell table:style-name="TD">
            <text:p text:style-name="TableP">Mikrocontroller, WiFi/BT, 4 MB Flash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DS1302N+</text:p>
          </table:table-cell>
          <table:table-cell table:style-name="TD_Alt">
            <text:p text:style-name="TableP">DIP-8</text:p>
          </table:table-cell>
          <table:table-cell table:style-name="TD_Alt">
            <text:p text:style-name="TableP">Batteriegepufferte Echtzeituhr (ThreeWire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VS1838B</text:p>
          </table:table-cell>
          <table:table-cell table:style-name="TD">
            <text:p text:style-name="TableP">TO-92</text:p>
          </table:table-cell>
          <table:table-cell table:style-name="TD">
            <text:p text:style-name="TableP">IR-Empfänger/-Demodulator 38 kHz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HV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Converter ~170 V DC für Nixie-Anoden</text:p>
          </table:table-cell>
        </table:table-row>
        <table:table-row>
          <table:table-cell table:style-name="TD">
            <text:p text:style-name="TableP">U5</text:p>
          </table:table-cell>
          <table:table-cell table:style-name="TD">
            <text:p text:style-name="TableP">AMS1117-3.3</text:p>
          </table:table-cell>
          <table:table-cell table:style-name="TD">
            <text:p text:style-name="TableP">SOT-223</text:p>
          </table:table-cell>
          <table:table-cell table:style-name="TD">
            <text:p text:style-name="TableP">LDO-Linearregler 5 V → 3,3 V</text:p>
          </table:table-cell>
        </table:table-row>
        <table:table-row>
          <table:table-cell table:style-name="TD_Alt">
            <text:p text:style-name="TableP">U22</text:p>
          </table:table-cell>
          <table:table-cell table:style-name="TD_Alt">
            <text:p text:style-name="TableP">USBLC6-2SC6</text:p>
          </table:table-cell>
          <table:table-cell table:style-name="TD_Alt">
            <text:p text:style-name="TableP">SOT-23-6</text:p>
          </table:table-cell>
          <table:table-cell table:style-name="TD_Alt">
            <text:p text:style-name="TableP">USB-ESD-/TVS-Schutz</text:p>
          </table:table-cell>
        </table:table-row>
        <table:table-row>
          <table:table-cell table:style-name="TD">
            <text:p text:style-name="TableP">BT1</text:p>
          </table:table-cell>
          <table:table-cell table:style-name="TD">
            <text:p text:style-name="TableP">CR2032</text:p>
          </table:table-cell>
          <table:table-cell table:style-name="TD">
            <text:p text:style-name="TableP">SMD-Halter</text:p>
          </table:table-cell>
          <table:table-cell table:style-name="TD">
            <text:p text:style-name="TableP">RTC-Backup-Batterie (~3 V)</text:p>
          </table:table-cell>
        </table:table-row>
        <table:table-row>
          <table:table-cell table:style-name="TD_Alt">
            <text:p text:style-name="TableP">Y1</text:p>
          </table:table-cell>
          <table:table-cell table:style-name="TD_Alt">
            <text:p text:style-name="TableP">32,768 kHz Quarz</text:p>
          </table:table-cell>
          <table:table-cell table:style-name="TD_Alt">
            <text:p text:style-name="TableP">Radial</text:p>
          </table:table-cell>
          <table:table-cell table:style-name="TD_Alt">
            <text:p text:style-name="TableP">RTC-Taktquelle</text:p>
          </table:table-cell>
        </table:table-row>
        <table:table-row>
          <table:table-cell table:style-name="TD">
            <text:p text:style-name="TableP">SW1–4</text:p>
          </table:table-cell>
          <table:table-cell table:style-name="TD">
            <text:p text:style-name="TableP">Taster SET/UP/DOWN/LIGHT</text:p>
          </table:table-cell>
          <table:table-cell table:style-name="TD">
            <text:p text:style-name="TableP">SMD</text:p>
          </table:table-cell>
          <table:table-cell table:style-name="TD">
            <text:p text:style-name="TableP">Bedienpanel</text:p>
          </table:table-cell>
        </table:table-row>
        <table:table-row>
          <table:table-cell table:style-name="TD_Alt">
            <text:p text:style-name="TableP">SW5</text:p>
          </table:table-cell>
          <table:table-cell table:style-name="TD_Alt">
            <text:p text:style-name="TableP">BOOT</text:p>
          </table:table-cell>
          <table:table-cell table:style-name="TD_Alt">
            <text:p text:style-name="TableP">SMD</text:p>
          </table:table-cell>
          <table:table-cell table:style-name="TD_Alt">
            <text:p text:style-name="TableP">ESP32-Bootmodus (Programmierung)</text:p>
          </table:table-cell>
        </table:table-row>
        <table:table-row>
          <table:table-cell table:style-name="TD">
            <text:p text:style-name="TableP">J2</text:p>
          </table:table-cell>
          <table:table-cell table:style-name="TD">
            <text:p text:style-name="TableP">USB Micro-B</text:p>
          </table:table-cell>
          <table:table-cell table:style-name="TD">
            <text:p text:style-name="TableP">Custom</text:p>
          </table:table-cell>
          <table:table-cell table:style-name="TD">
            <text:p text:style-name="TableP">5 V-Einspeisung &amp; Firmware-Upload</text:p>
          </table:table-cell>
        </table:table-row>
        <table:table-row>
          <table:table-cell table:style-name="TD_Alt">
            <text:p text:style-name="TableP">J3</text:p>
          </table:table-cell>
          <table:table-cell table:style-name="TD_Alt">
            <text:p text:style-name="TableP">PinHeader 1×8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Inter-Board Logik-Signale</text:p>
          </table:table-cell>
        </table:table-row>
        <table:table-row>
          <table:table-cell table:style-name="TD">
            <text:p text:style-name="TableP">J4</text:p>
          </table:table-cell>
          <table:table-cell table:style-name="TD">
            <text:p text:style-name="TableP">PinHeader 1×4</text:p>
          </table:table-cell>
          <table:table-cell table:style-name="TD">
            <text:p text:style-name="TableP">2,54 mm</text:p>
          </table:table-cell>
          <table:table-cell table:style-name="TD">
            <text:p text:style-name="TableP">Inter-Board HV-Versorgung</text:p>
          </table:table-cell>
        </table:table-row>
        <table:table-row>
          <table:table-cell table:style-name="TD_Alt">
            <text:p text:style-name="TableP">J5</text:p>
          </table:table-cell>
          <table:table-cell table:style-name="TD_Alt">
            <text:p text:style-name="TableP">PinHeader 1×2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Optionaler LDR-Sensor (nicht bestückt)</text:p>
          </table:table-cell>
        </table:table-row>
      </table:table>
      <text:p text:style-name="Text_Body"/>
      <text:h text:style-name="Heading_2" text:outline-level="2">Spannungsversorgungskonzept</text:h>
      <text:p text:style-name="Text_Body">Die Versorgung erfolgt über den Micro-USB-Anschluss J2 (5 V). Aus der 5-V-Schiene erzeugen zwei Wandler die benötigten Spannungen:</text:p>
      <text:h text:style-name="Heading_3" text:outline-level="3">3,3-V-Logikversorgung (AMS1117-3.3)</text:h>
      <text:p text:style-name="Text_Body">Der AMS1117-3.3 (U5) ist ein Low-Dropout-Regler im SOT-223-Gehäuse. Er versorgt den ESP32-S3, den DS1302, den IR-Empfänger sowie alle Pull-up-Widerstände. Abblockkondensatoren (100 nF + 100 µF) stabilisieren die Ausgangsspannung.</text:p>
      <text:h text:style-name="Heading_3" text:outline-level="3">Hochspannung ~170 V DC (HV-MOD)</text:h>
      <text:p text:style-name="Text_Body">Der HV-MOD (U4) ist ein Boost-Converter-Modul, das aus 5 V eine geregelte Gleichspannung von ca. 170–180 V erzeugt. Diese Spannung liegt dauerhaft an den Anoden aller sechs Nixie-Röhren an. Die Kathoden der jeweils anzuzeigenden Ziffer werden durch NPN-Transistoren auf dem Display Board auf GND gezogen.</text:p>
      <text:p text:style-name="Note">⚠ Hochspannungswarnung: Der HV-Ausgang führt ~170 V DC — lebensgefährlich bei Berührung. Vor Arbeiten an der Schaltung die Versorgung trennen und Kondensatoren entladen.</text:p>
      <text:h text:style-name="Heading_2" text:outline-level="2">ESP32-S3 GPIO-Belegung</text:h>
      <table:table table:style-name="TableStyle">
        <table:table-column table:style-name="Col1p2"/>
        <table:table-column table:style-name="Col2p5"/>
        <table:table-column table:style-name="Col2p0"/>
        <table:table-column table:style-name="Col10p3"/>
        <table:table-row>
          <table:table-cell table:style-name="TH">
            <text:p text:style-name="TableH">GPIO</text:p>
          </table:table-cell>
          <table:table-cell table:style-name="TH">
            <text:p text:style-name="TableH">Signal</text:p>
          </table:table-cell>
          <table:table-cell table:style-name="TH">
            <text:p text:style-name="TableH">Richtung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RTC_CE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Chip Enable (ThreeWire)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RTC_IO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DS1302 Datenleitng (ThreeWire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RTC_CLK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Takt (ThreeWire)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I2C_SDA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I²C Daten → 4× MCP23017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I2C_SCL</text:p>
          </table:table-cell>
          <table:table-cell table:style-name="TD">
            <text:p text:style-name="TableP">Output</text:p>
          </table:table-cell>
          <table:table-cell table:style-name="TD">
            <text:p text:style-name="TableP">I²C Takt → 4× MCP23017</text:p>
          </table:table-cell>
        </table:table-row>
        <table:table-row>
          <table:table-cell table:style-name="TD_Alt">
            <text:p text:style-name="TableP">13</text:p>
          </table:table-cell>
          <table:table-cell table:style-name="TD_Alt">
            <text:p text:style-name="TableP">BTN_SET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SET (INPUT_PULLUP, aktiv LOW)</text:p>
          </table:table-cell>
        </table:table-row>
        <table:table-row>
          <table:table-cell table:style-name="TD">
            <text:p text:style-name="TableP">14</text:p>
          </table:table-cell>
          <table:table-cell table:style-name="TD">
            <text:p text:style-name="TableP">BTN_UP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UP (INPUT_PULLUP, aktiv LOW)</text:p>
          </table:table-cell>
        </table:table-row>
        <table:table-row>
          <table:table-cell table:style-name="TD_Alt">
            <text:p text:style-name="TableP">15</text:p>
          </table:table-cell>
          <table:table-cell table:style-name="TD_Alt">
            <text:p text:style-name="TableP">BTN_DOWN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DOWN (INPUT_PULLUP, aktiv LOW)</text:p>
          </table:table-cell>
        </table:table-row>
        <table:table-row>
          <table:table-cell table:style-name="TD">
            <text:p text:style-name="TableP">16</text:p>
          </table:table-cell>
          <table:table-cell table:style-name="TD">
            <text:p text:style-name="TableP">BTN_LIGHT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LIGHT (INPUT_PULLUP, aktiv LOW)</text:p>
          </table:table-cell>
        </table:table-row>
        <table:table-row>
          <table:table-cell table:style-name="TD_Alt">
            <text:p text:style-name="TableP">21</text:p>
          </table:table-cell>
          <table:table-cell table:style-name="TD_Alt">
            <text:p text:style-name="TableP">NEO_DATA</text:p>
          </table:table-cell>
          <table:table-cell table:style-name="TD_Alt">
            <text:p text:style-name="TableP">Output</text:p>
          </table:table-cell>
          <table:table-cell table:style-name="TD_Alt">
            <text:p text:style-name="TableP">WS2812B DIN (10 LEDs, verkettete Kette)</text:p>
          </table:table-cell>
        </table:table-row>
        <table:table-row>
          <table:table-cell table:style-name="TD">
            <text:p text:style-name="TableP">48</text:p>
          </table:table-cell>
          <table:table-cell table:style-name="TD">
            <text:p text:style-name="TableP">IR_RECV</text:p>
          </table:table-cell>
          <table:table-cell table:style-name="TD">
            <text:p text:style-name="TableP">Input</text:p>
          </table:table-cell>
          <table:table-cell table:style-name="TD">
            <text:p text:style-name="TableP">VS1838B demodulierter 38-kHz-Ausgang</text:p>
          </table:table-cell>
        </table:table-row>
      </table:table>
      <text:p text:style-name="Text_Body"/>
      <text:h text:style-name="Heading_2" text:outline-level="2">Echtzeituhr DS1302</text:h>
      <text:p text:style-name="Text_Body">Der DS1302 (U2) ist eine batteriegepufferte Echtzeituhr mit ThreeWire-Interface (kein I²C/SPI-Standard). Die Kommunikation erfolgt über drei GPIOs: CE (Chip Enable, GPIO2), IO (Daten, GPIO4) und CLK (Takt, GPIO5). Der 32,768-kHz-Quarz Y1 liefert die Zeitbasis. Die CR2032-Backup-Batterie (BT1) hält die Uhrzeit auch bei Stromausfall. In der Firmware wird die Bibliothek «Rtc by Makuna» verwendet (Klasse RtcDS1302).</text:p>
      <text:h text:style-name="Heading_2" text:outline-level="2">IR-Empfänger VS1838B</text:h>
      <text:p text:style-name="Text_Body">Der VS1838B (U3) ist ein integrierter IR-Empfänger mit eingebautem 38-kHz-Bandpassfilter und Demodulator. Er liefert am Ausgang (GPIO48) ein NF-Signal, das direkt von der IRremoteESP8266-Bibliothek dekodiert wird. Unterstützte Protokolle: NEC, Samsung, Sony, RC5, RC6 u.a. Alle empfangenen Codes werden gegen die im NVS gespeicherten angelernten Codes verglichen.</text:p>
      <text:p text:style-name="PageBreak"/>
      <text:h text:style-name="Heading_1" text:outline-level="1">PCB 2 – Nixie Display Board</text:h>
      <text:p text:style-name="Text_Body">Das Nixie Display Board (Rev 2.01, 2026-04-06) enthält die gesamte Anzeigeelektronik. Vier MCP23017 I²C-GPIO-Expander stellen 64 digitale Ausgänge bereit, von denen 60 jeweils einen SMBTA42-NPN-Transistor ansteuern. Jeder Transistor schaltet eine Nixie-Kathode auf GND. Zehn WS2812B-LEDs liefern die Hintergrundbeleuchtung.</text:p>
      <text:h text:style-name="Heading_2" text:outline-level="2">Schaltplan</text:h>
      <text:p text:style-name="Text_Body"><draw:frame draw:name="nixie_sch" draw:style-name="Graphics" svg:width="15.5cm" svg:height="11.0cm" text:anchor-type="paragraph" draw:z-index="0"><draw:image xlink:href="Pictures/nixie_sch.png" xlink:type="simple" xlink:show="embed" xlink:actuate="onLoad"/></draw:frame></text:p>
      <text:p text:style-name="Caption"><text:span text:style-name="Italic">Abb. 3 – Nixie Display Board Schaltplan (nixieclockin12_V2-Sch.pdf)</text:span></text:p>
      <text:p text:style-name="Text_Body"/>
      <text:h text:style-name="Heading_2" text:outline-level="2">PCB-Layout</text:h>
      <text:p text:style-name="Text_Body"><draw:frame draw:name="nixie_pcb" draw:style-name="Graphics" svg:width="15.5cm" svg:height="11.0cm" text:anchor-type="paragraph" draw:z-index="0"><draw:image xlink:href="Pictures/nixie_pcb.png" xlink:type="simple" xlink:show="embed" xlink:actuate="onLoad"/></draw:frame></text:p>
      <text:p text:style-name="Caption"><text:span text:style-name="Italic">Abb. 4 – Nixie Display Board PCB-Layout (nixieclockin12_V2-BPHL.pdf)</text:span></text:p>
      <text:p text:style-name="Text_Body"/>
      <text:h text:style-name="Heading_2" text:outline-level="2">Komponenten</text:h>
      <table:table table:style-name="TableStyle">
        <table:table-column table:style-name="Col1p8"/>
        <table:table-column table:style-name="Col4p5"/>
        <table:table-column table:style-name="Col1p5"/>
        <table:table-column table:style-name="Col8p2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Anzahl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–U4</text:p>
          </table:table-cell>
          <table:table-cell table:style-name="TD">
            <text:p text:style-name="TableP">MCP23017-E/SO (SOIC-28)</text:p>
          </table:table-cell>
          <table:table-cell table:style-name="TD">
            <text:p text:style-name="TableP">4</text:p>
          </table:table-cell>
          <table:table-cell table:style-name="TD">
            <text:p text:style-name="TableP">16-bit I²C GPIO-Expander, je 16 Ausgänge</text:p>
          </table:table-cell>
        </table:table-row>
        <table:table-row>
          <table:table-cell table:style-name="TD_Alt">
            <text:p text:style-name="TableP">Q1–Q60</text:p>
          </table:table-cell>
          <table:table-cell table:style-name="TD_Alt">
            <text:p text:style-name="TableP">SMBTA42 (TSOT-23)</text:p>
          </table:table-cell>
          <table:table-cell table:style-name="TD_Alt">
            <text:p text:style-name="TableP">60</text:p>
          </table:table-cell>
          <table:table-cell table:style-name="TD_Alt">
            <text:p text:style-name="TableP">NPN 300 V Hochvolt-Transistor als Kathodenschalter</text:p>
          </table:table-cell>
        </table:table-row>
        <table:table-row>
          <table:table-cell table:style-name="TD">
            <text:p text:style-name="TableP">NX1–NX6</text:p>
          </table:table-cell>
          <table:table-cell table:style-name="TD">
            <text:p text:style-name="TableP">IN-12A</text:p>
          </table:table-cell>
          <table:table-cell table:style-name="TD">
            <text:p text:style-name="TableP">6</text:p>
          </table:table-cell>
          <table:table-cell table:style-name="TD">
            <text:p text:style-name="TableP">Numerische Nixie-Röhre, Aufsicht, 10 Kathoden (0–9)</text:p>
          </table:table-cell>
        </table:table-row>
        <table:table-row>
          <table:table-cell table:style-name="TD_Alt">
            <text:p text:style-name="TableP">D1</text:p>
          </table:table-cell>
          <table:table-cell table:style-name="TD_Alt">
            <text:p text:style-name="TableP">WS2812B-SMD (×6)</text:p>
          </table:table-cell>
          <table:table-cell table:style-name="TD_Alt">
            <text:p text:style-name="TableP">6</text:p>
          </table:table-cell>
          <table:table-cell table:style-name="TD_Alt">
            <text:p text:style-name="TableP">Hintergrundbeleuchtung, Pixel 0–5 (GRB-Farbreihenfolge)</text:p>
          </table:table-cell>
        </table:table-row>
        <table:table-row>
          <table:table-cell table:style-name="TD">
            <text:p text:style-name="TableP">D2–D6</text:p>
          </table:table-cell>
          <table:table-cell table:style-name="TD">
            <text:p text:style-name="TableP">WS2812B-SMD</text:p>
          </table:table-cell>
          <table:table-cell table:style-name="TD">
            <text:p text:style-name="TableP">5</text:p>
          </table:table-cell>
          <table:table-cell table:style-name="TD">
            <text:p text:style-name="TableP">Zusätzliche NeoPixel (SMD)</text:p>
          </table:table-cell>
        </table:table-row>
        <table:table-row>
          <table:table-cell table:style-name="TD_Alt">
            <text:p text:style-name="TableP">D7–D9</text:p>
          </table:table-cell>
          <table:table-cell table:style-name="TD_Alt">
            <text:p text:style-name="TableP">WS2812B-THT (YF923)</text:p>
          </table:table-cell>
          <table:table-cell table:style-name="TD_Alt">
            <text:p text:style-name="TableP">3</text:p>
          </table:table-cell>
          <table:table-cell table:style-name="TD_Alt">
            <text:p text:style-name="TableP">Trennpunkt-LEDs (Durchsteck, RGB-Farbreihenfolge)</text:p>
          </table:table-cell>
        </table:table-row>
        <table:table-row>
          <table:table-cell table:style-name="TD">
            <text:p text:style-name="TableP">R1–R64</text:p>
          </table:table-cell>
          <table:table-cell table:style-name="TD">
            <text:p text:style-name="TableP">3,3 kΩ (0805)</text:p>
          </table:table-cell>
          <table:table-cell table:style-name="TD">
            <text:p text:style-name="TableP">64</text:p>
          </table:table-cell>
          <table:table-cell table:style-name="TD">
            <text:p text:style-name="TableP">Basis-Vorwiderstände für SMBTA42</text:p>
          </table:table-cell>
        </table:table-row>
        <table:table-row>
          <table:table-cell table:style-name="TD_Alt">
            <text:p text:style-name="TableP">R65–R70</text:p>
          </table:table-cell>
          <table:table-cell table:style-name="TD_Alt">
            <text:p text:style-name="TableP">10 kΩ (THT axial)</text:p>
          </table:table-cell>
          <table:table-cell table:style-name="TD_Alt">
            <text:p text:style-name="TableP">6</text:p>
          </table:table-cell>
          <table:table-cell table:style-name="TD_Alt">
            <text:p text:style-name="TableP">I²C-Bus-Pull-ups + MCP-Adress-Pull-ups</text:p>
          </table:table-cell>
        </table:table-row>
        <table:table-row>
          <table:table-cell table:style-name="TD">
            <text:p text:style-name="TableP">C1–C4</text:p>
          </table:table-cell>
          <table:table-cell table:style-name="TD">
            <text:p text:style-name="TableP">100 nF (0805)</text:p>
          </table:table-cell>
          <table:table-cell table:style-name="TD">
            <text:p text:style-name="TableP">4</text:p>
          </table:table-cell>
          <table:table-cell table:style-name="TD">
            <text:p text:style-name="TableP">Abblockkondensatoren je MCP23017 (VCC gegen GND)</text:p>
          </table:table-cell>
        </table:table-row>
        <table:table-row>
          <table:table-cell table:style-name="TD_Alt">
            <text:p text:style-name="TableP">J1</text:p>
          </table:table-cell>
          <table:table-cell table:style-name="TD_Alt">
            <text:p text:style-name="TableP">PinHeader 1×8 (2,54 mm)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Inter-Board Logik-Signale ← Logic Board J3</text:p>
          </table:table-cell>
        </table:table-row>
        <table:table-row>
          <table:table-cell table:style-name="TD">
            <text:p text:style-name="TableP">J2</text:p>
          </table:table-cell>
          <table:table-cell table:style-name="TD">
            <text:p text:style-name="TableP">PinHeader 1×4 (2,54 mm)</text:p>
          </table:table-cell>
          <table:table-cell table:style-name="TD">
            <text:p text:style-name="TableP">1</text:p>
          </table:table-cell>
          <table:table-cell table:style-name="TD">
            <text:p text:style-name="TableP">Inter-Board HV-Versorgung ← Logic Board J4</text:p>
          </table:table-cell>
        </table:table-row>
      </table:table>
      <text:p text:style-name="Text_Body"/>
      <text:h text:style-name="Heading_2" text:outline-level="2">MCP23017 Ansteuerungskonzept</text:h>
      <text:p text:style-name="Text_Body">Die vier MCP23017 (U1–U4) sind am gemeinsamen I²C-Bus (SDA=GPIO8, SCL=GPIO9) angeschlossen. Die I²C-Adressen werden durch die Hardware-Adresspins A0, A1, A2 festgelegt:</text:p>
      <table:table table:style-name="TableStyle">
        <table:table-column table:style-name="Col1p0"/>
        <table:table-column table:style-name="Col2p5"/>
        <table:table-column table:style-name="Col1p0"/>
        <table:table-column table:style-name="Col1p0"/>
        <table:table-column table:style-name="Col1p0"/>
        <table:table-column table:style-name="Col9p5"/>
        <table:table-row>
          <table:table-cell table:style-name="TH">
            <text:p text:style-name="TableH">IC</text:p>
          </table:table-cell>
          <table:table-cell table:style-name="TH">
            <text:p text:style-name="TableH">I²C-Adresse</text:p>
          </table:table-cell>
          <table:table-cell table:style-name="TH">
            <text:p text:style-name="TableH">A2</text:p>
          </table:table-cell>
          <table:table-cell table:style-name="TH">
            <text:p text:style-name="TableH">A1</text:p>
          </table:table-cell>
          <table:table-cell table:style-name="TH">
            <text:p text:style-name="TableH">A0</text:p>
          </table:table-cell>
          <table:table-cell table:style-name="TH">
            <text:p text:style-name="TableH">Zuständige Röhre(n)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0x2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Tube 0 (Stundenzehner), Tube 1 Bits 10–15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0x21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1 Bits 0–3, Tube 2 (Minutenzehner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0x22</text:p>
          </table:table-cell>
          <table:table-cell table:style-name="TD">
            <text:p text:style-name="TableP">0</text:p>
          </table:table-cell>
          <table:table-cell table:style-name="TD">
            <text:p text:style-name="TableP">1</text:p>
          </table:table-cell>
          <table:table-cell table:style-name="TD">
            <text:p text:style-name="TableP">0</text:p>
          </table:table-cell>
          <table:table-cell table:style-name="TD">
            <text:p text:style-name="TableP">Tube 3 (Minuteneiner), Tube 4 Bits 10–15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4 Bits 0–3, Tube 5 (Sekundeneiner)</text:p>
          </table:table-cell>
        </table:table-row>
      </table:table>
      <text:p text:style-name="Text_Body"/>
      <text:p text:style-name="Text_Body">Jeder MCP23017 verfügt über zwei 8-Bit-Ports (GPA0–7, GPB0–7), also 16 Ausgänge pro IC. Alle 64 Ausgänge werden beim Start im `nixieInit()`-Aufruf als Output konfiguriert (IODIR-Register = 0x00). Die Ansteuerung erfolgt über das OLATA-Register (0x14) mit einem einzigen I²C-Schreibzugriff, der beide Ports gleichzeitig setzt (16 Bits, Low-Byte GPA, High-Byte GPB).</text:p>
      <text:h text:style-name="Heading_3" text:outline-level="3">Tube-zu-MCP-Bit-Zuordnung</text:h>
      <text:p text:style-name="Text_Body">Die Verteilung der 60 Kathoden (6 Röhren × 10 Ziffern) auf die MCP-Bits ist in der Firmware als Lookup-Tabelle `digitPin[6][10]` implementiert (Struktur `DigitPin {uint8_t mcp; uint8_t bit;}`):</text:p>
      <table:table table:style-name="TableStyle">
        <table:table-column table:style-name="Col1p0"/>
        <table:table-column table:style-name="Col3p5"/>
        <table:table-column table:style-name="Col2p5"/>
        <table:table-column table:style-name="Col9p0"/>
        <table:table-row>
          <table:table-cell table:style-name="TH">
            <text:p text:style-name="TableH">Tube</text:p>
          </table:table-cell>
          <table:table-cell table:style-name="TH">
            <text:p text:style-name="TableH">Anzeige</text:p>
          </table:table-cell>
          <table:table-cell table:style-name="TH">
            <text:p text:style-name="TableH">MCP</text:p>
          </table:table-cell>
          <table:table-cell table:style-name="TH">
            <text:p text:style-name="TableH">GPA/GPB-Bits</text:p>
          </table:table-cell>
        </table:table-row>
        <table:table-row>
          <table:table-cell table:style-name="TD">
            <text:p text:style-name="TableP">0</text:p>
          </table:table-cell>
          <table:table-cell table:style-name="TD">
            <text:p text:style-name="TableP">Stundenzehner</text:p>
          </table:table-cell>
          <table:table-cell table:style-name="TD">
            <text:p text:style-name="TableP">0x20</text:p>
          </table:table-cell>
          <table:table-cell table:style-name="TD">
            <text:p text:style-name="TableP">Bits 0–9 (Ziffern 1,2,3,4,5,6,7,8,9,0)</text:p>
          </table:table-cell>
        </table:table-row>
        <table:table-row>
          <table:table-cell table:style-name="TD_Alt">
            <text:p text:style-name="TableP">1</text:p>
          </table:table-cell>
          <table:table-cell table:style-name="TD_Alt">
            <text:p text:style-name="TableP">Stundeneiner</text:p>
          </table:table-cell>
          <table:table-cell table:style-name="TD_Alt">
            <text:p text:style-name="TableP">0x20+0x21</text:p>
          </table:table-cell>
          <table:table-cell table:style-name="TD_Alt">
            <text:p text:style-name="TableP">MCP0 Bits 10–15 + MCP1 Bits 0–3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Minutenzehner</text:p>
          </table:table-cell>
          <table:table-cell table:style-name="TD">
            <text:p text:style-name="TableP">0x21</text:p>
          </table:table-cell>
          <table:table-cell table:style-name="TD">
            <text:p text:style-name="TableP">Bits 4–13</text:p>
          </table:table-cell>
        </table:table-row>
        <table:table-row>
          <table:table-cell table:style-name="TD_Alt">
            <text:p text:style-name="TableP">3</text:p>
          </table:table-cell>
          <table:table-cell table:style-name="TD_Alt">
            <text:p text:style-name="TableP">Minuteneiner</text:p>
          </table:table-cell>
          <table:table-cell table:style-name="TD_Alt">
            <text:p text:style-name="TableP">0x22</text:p>
          </table:table-cell>
          <table:table-cell table:style-name="TD_Alt">
            <text:p text:style-name="TableP">Bits 0–9</text:p>
          </table:table-cell>
        </table:table-row>
        <table:table-row>
          <table:table-cell table:style-name="TD">
            <text:p text:style-name="TableP">4</text:p>
          </table:table-cell>
          <table:table-cell table:style-name="TD">
            <text:p text:style-name="TableP">Sekundenzehner</text:p>
          </table:table-cell>
          <table:table-cell table:style-name="TD">
            <text:p text:style-name="TableP">0x22+0x23</text:p>
          </table:table-cell>
          <table:table-cell table:style-name="TD">
            <text:p text:style-name="TableP">MCP2 Bits 10–15 + MCP3 Bits 0–3</text:p>
          </table:table-cell>
        </table:table-row>
        <table:table-row>
          <table:table-cell table:style-name="TD_Alt">
            <text:p text:style-name="TableP">5</text:p>
          </table:table-cell>
          <table:table-cell table:style-name="TD_Alt">
            <text:p text:style-name="TableP">Sekundeneiner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Bits 4–13</text:p>
          </table:table-cell>
        </table:table-row>
      </table:table>
      <text:p text:style-name="Text_Body"/>
      <text:p text:style-name="Text_Body">Ein Digit-Wert von 10 bedeutet «Röhre blank» — es wird kein Bit gesetzt, alle Kathoden bleiben HIGH, die Röhre zeigt nichts an.</text:p>
      <text:h text:style-name="Heading_2" text:outline-level="2">Transistor-Kathodenschaltung</text:h>
      <text:p text:style-name="Text_Body">Jede Nixie-Kathode wird über einen SMBTA42-NPN-Transistor auf GND gezogen. Der SMBTA42 ist für 300 V Kollektor-Emitter-Spannung ausgelegt — notwendig, da die Nixie-Anoden auf ~170 V liegen. Der Basis-Vorwiderstand beträgt 3,3 kΩ. Bei einem GPIO-High von 3,3 V fließt ein Basisstrom von ca. 1 mA, was den Transistor sicher in die Sättigung treibt (typischer Verstärkungsfaktor hFE ≥ 100). Der Kollektor-Strom (Katodenleuchtstrom) beträgt typisch 1–3 mA, begrenzt durch den internen Widerstand der Nixie-Röhre.</text:p>
      <text:h text:style-name="Heading_2" text:outline-level="2">WS2812B NeoPixel-Konfiguration</text:h>
      <text:p text:style-name="Text_Body">Die 10 WS2812B-LEDs sind als verkettete Kette an GPIO21 angeschlossen. SMD- und THT-Varianten haben unterschiedliche Farbreihenfolgen, was in der Firmware berücksichtigt wird:</text:p>
      <table:table table:style-name="TableStyle">
        <table:table-column table:style-name="Col1p5"/>
        <table:table-column table:style-name="Col3p5"/>
        <table:table-column table:style-name="Col3p5"/>
        <table:table-column table:style-name="Col7p5"/>
        <table:table-row>
          <table:table-cell table:style-name="TH">
            <text:p text:style-name="TableH">Pixel</text:p>
          </table:table-cell>
          <table:table-cell table:style-name="TH">
            <text:p text:style-name="TableH">Typ</text:p>
          </table:table-cell>
          <table:table-cell table:style-name="TH">
            <text:p text:style-name="TableH">Farbreihenfolge</text:p>
          </table:table-cell>
          <table:table-cell table:style-name="TH">
            <text:p text:style-name="TableH">Position / Funktion</text:p>
          </table:table-cell>
        </table:table-row>
        <table:table-row>
          <table:table-cell table:style-name="TD">
            <text:p text:style-name="TableP">0–5</text:p>
          </table:table-cell>
          <table:table-cell table:style-name="TD">
            <text:p text:style-name="TableP">WS2812B-SMD</text:p>
          </table:table-cell>
          <table:table-cell table:style-name="TD">
            <text:p text:style-name="TableP">GRB</text:p>
          </table:table-cell>
          <table:table-cell table:style-name="TD">
            <text:p text:style-name="TableP">Röhrenhintergrundbeleuchtung (6 LEDs)</text:p>
          </table:table-cell>
        </table:table-row>
        <table:table-row>
          <table:table-cell table:style-name="TD_Alt">
            <text:p text:style-name="TableP">6–9</text:p>
          </table:table-cell>
          <table:table-cell table:style-name="TD_Alt">
            <text:p text:style-name="TableP">WS2812B-THT YF923</text:p>
          </table:table-cell>
          <table:table-cell table:style-name="TD_Alt">
            <text:p text:style-name="TableP">RGB</text:p>
          </table:table-cell>
          <table:table-cell table:style-name="TD_Alt">
            <text:p text:style-name="TableP">Trennpunkt-LEDs zwischen Zifferngruppen (4 LEDs)</text:p>
          </table:table-cell>
        </table:table-row>
      </table:table>
      <text:p text:style-name="Text_Body"/>
      <text:p text:style-name="PageBreak"/>
      <text:h text:style-name="Heading_1" text:outline-level="1">Firmware-Architektur</text:h>
      <text:p text:style-name="Text_Body">Die Firmware ist als Arduino-Sketch für den ESP32-S3 implementiert und in mehrere `.ino`-Module aufgeteilt. Arduino kompiliert alle `.ino`-Dateien eines Verzeichnisses automatisch zu einer einzigen Compilation Unit — globale Variablen und Funktionen sind dateienübergreifend sichtbar.</text:p>
      <text:h text:style-name="Heading_2" text:outline-level="2">Modulübersicht</text:h>
      <table:table table:style-name="TableStyle">
        <table:table-column table:style-name="Col4p5"/>
        <table:table-column table:style-name="Col1p5"/>
        <table:table-column table:style-name="Col10p0"/>
        <table:table-row>
          <table:table-cell table:style-name="TH">
            <text:p text:style-name="TableH">Datei</text:p>
          </table:table-cell>
          <table:table-cell table:style-name="TH">
            <text:p text:style-name="TableH">Zeilen</text:p>
          </table:table-cell>
          <table:table-cell table:style-name="TH">
            <text:p text:style-name="TableH">Inhalt / Verantwortlichkeit</text:p>
          </table:table-cell>
        </table:table-row>
        <table:table-row>
          <table:table-cell table:style-name="TD">
            <text:p text:style-name="TableP">NixieClockUltra.ino</text:p>
          </table:table-cell>
          <table:table-cell table:style-name="TD">
            <text:p text:style-name="TableP">~360</text:p>
          </table:table-cell>
          <table:table-cell table:style-name="TD">
            <text:p text:style-name="TableP">Globals, setup(), loop(), Edit-Mode-FSM, Slot-Animation, Konstanten</text:p>
          </table:table-cell>
        </table:table-row>
        <table:table-row>
          <table:table-cell table:style-name="TD_Alt">
            <text:p text:style-name="TableP">nixie_driver.ino</text:p>
          </table:table-cell>
          <table:table-cell table:style-name="TD_Alt">
            <text:p text:style-name="TableP">91</text:p>
          </table:table-cell>
          <table:table-cell table:style-name="TD_Alt">
            <text:p text:style-name="TableP">nixieInit(), nixieWrite(), MCP23017-I²C-Abstraktion, Shadow-Register, Mutex</text:p>
          </table:table-cell>
        </table:table-row>
        <table:table-row>
          <table:table-cell table:style-name="TD">
            <text:p text:style-name="TableP">display.ino</text:p>
          </table:table-cell>
          <table:table-cell table:style-name="TD">
            <text:p text:style-name="TableP">47</text:p>
          </table:table-cell>
          <table:table-cell table:style-name="TD">
            <text:p text:style-name="TableP">setDisplayTime(), Fade-In/Out-Mechanismus</text:p>
          </table:table-cell>
        </table:table-row>
        <table:table-row>
          <table:table-cell table:style-name="TD_Alt">
            <text:p text:style-name="TableP">buttons.ino</text:p>
          </table:table-cell>
          <table:table-cell table:style-name="TD_Alt">
            <text:p text:style-name="TableP">119</text:p>
          </table:table-cell>
          <table:table-cell table:style-name="TD_Alt">
            <text:p text:style-name="TableP">Entprell-FSM für 4 Taster, Kurz-/Langdruck-Erkennung</text:p>
          </table:table-cell>
        </table:table-row>
        <table:table-row>
          <table:table-cell table:style-name="TD">
            <text:p text:style-name="TableP">rtc.ino</text:p>
          </table:table-cell>
          <table:table-cell table:style-name="TD">
            <text:p text:style-name="TableP">15</text:p>
          </table:table-cell>
          <table:table-cell table:style-name="TD">
            <text:p text:style-name="TableP">readRTC(), writeRTC() via DS1302/ThreeWire (Makuna-Bibliothek)</text:p>
          </table:table-cell>
        </table:table-row>
        <table:table-row>
          <table:table-cell table:style-name="TD_Alt">
            <text:p text:style-name="TableP">neo_animation.ino</text:p>
          </table:table-cell>
          <table:table-cell table:style-name="TD_Alt">
            <text:p text:style-name="TableP">99</text:p>
          </table:table-cell>
          <table:table-cell table:style-name="TD_Alt">
            <text:p text:style-name="TableP">Rainbow, Statisch, Puls, Slot-Machine-Animation, Trennpunkt-Blinken</text:p>
          </table:table-cell>
        </table:table-row>
        <table:table-row>
          <table:table-cell table:style-name="TD">
            <text:p text:style-name="TableP">web_server.ino</text:p>
          </table:table-cell>
          <table:table-cell table:style-name="TD">
            <text:p text:style-name="TableP">559</text:p>
          </table:table-cell>
          <table:table-cell table:style-name="TD">
            <text:p text:style-name="TableP">Eingebettetes HTML/CSS/JS, alle 16 API-Handler, WiFi AP+STA, NTP</text:p>
          </table:table-cell>
        </table:table-row>
      </table:table>
      <text:p text:style-name="Text_Body"/>
      <text:h text:style-name="Heading_2" text:outline-level="2">Bibliotheksabhängigkeiten</text:h>
      <table:table table:style-name="TableStyle">
        <table:table-column table:style-name="Col4p0"/>
        <table:table-column table:style-name="Col4p0"/>
        <table:table-column table:style-name="Col2p0"/>
        <table:table-column table:style-name="Col6p0"/>
        <table:table-row>
          <table:table-cell table:style-name="TH">
            <text:p text:style-name="TableH">Bibliothek</text:p>
          </table:table-cell>
          <table:table-cell table:style-name="TH">
            <text:p text:style-name="TableH">Autor</text:p>
          </table:table-cell>
          <table:table-cell table:style-name="TH">
            <text:p text:style-name="TableH">Version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</text:p>
          </table:table-cell>
          <table:table-cell table:style-name="TD">
            <text:p text:style-name="TableP">aktuell</text:p>
          </table:table-cell>
          <table:table-cell table:style-name="TD">
            <text:p text:style-name="TableP">WS2812B-Ansteuerung (GRB + RGB)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Michael C. Miller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DS1302 RTC über ThreeWire-Protokoll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me-no-dev</text:p>
          </table:table-cell>
          <table:table-cell table:style-name="TD">
            <text:p text:style-name="TableP">aktuell</text:p>
          </table:table-cell>
          <table:table-cell table:style-name="TD">
            <text:p text:style-name="TableP">Async-TCP-Stack für ESP32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me-no-dev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Nicht-blockierender HTTP-Server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Benoit Blanchon</text:p>
          </table:table-cell>
          <table:table-cell table:style-name="TD">
            <text:p text:style-name="TableP">v6.x</text:p>
          </table:table-cell>
          <table:table-cell table:style-name="TD">
            <text:p text:style-name="TableP">JSON-Serialisierung (v7 inkompatibel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David Conran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IR-Empfang NEC/Samsung/Sony/RC5/RC6 …</text:p>
          </table:table-cell>
        </table:table-row>
      </table:table>
      <text:p text:style-name="Text_Body"/>
      <text:p text:style-name="Note">⚠ ArduinoJson muss in Version 6.x installiert sein — Version 7 hat eine inkompatible API.</text:p>
      <text:h text:style-name="Heading_2" text:outline-level="2">Setup-Ablauf</text:h>
      <text:p text:style-name="Text_Body">Die setup()-Funktion wird einmalig nach dem Einschalten ausgeführt:</text:p>
      <table:table table:style-name="TableStyle">
        <table:table-column table:style-name="Col1p2"/>
        <table:table-column table:style-name="Col4p5"/>
        <table:table-column table:style-name="Col10p3"/>
        <table:table-row>
          <table:table-cell table:style-name="TH">
            <text:p text:style-name="TableH">Schritt</text:p>
          </table:table-cell>
          <table:table-cell table:style-name="TH">
            <text:p text:style-name="TableH">Funktion / Aktion</text:p>
          </table:table-cell>
          <table:table-cell table:style-name="TH">
            <text:p text:style-name="TableH">Details</text:p>
          </table:table-cell>
        </table:table-row>
        <table:table-row>
          <table:table-cell table:style-name="TD">
            <text:p text:style-name="TableP">1</text:p>
          </table:table-cell>
          <table:table-cell table:style-name="TD">
            <text:p text:style-name="TableP">Serial.begin(115200)</text:p>
          </table:table-cell>
          <table:table-cell table:style-name="TD">
            <text:p text:style-name="TableP">Debug-Ausgabe aktivieren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pinMode(BTN_*, INPUT_PULLUP)</text:p>
          </table:table-cell>
          <table:table-cell table:style-name="TD_Alt">
            <text:p text:style-name="TableP">Alle 4 Taster-GPIOs konfigurieren</text:p>
          </table:table-cell>
        </table:table-row>
        <table:table-row>
          <table:table-cell table:style-name="TD">
            <text:p text:style-name="TableP">3</text:p>
          </table:table-cell>
          <table:table-cell table:style-name="TD">
            <text:p text:style-name="TableP">strip.begin() / clear()</text:p>
          </table:table-cell>
          <table:table-cell table:style-name="TD">
            <text:p text:style-name="TableP">NeoPixel initialisieren, alle LEDs aus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prefs.begin("nixie")</text:p>
          </table:table-cell>
          <table:table-cell table:style-name="TD_Alt">
            <text:p text:style-name="TableP">NVS öffnen, Helligkeit/Anim/IR-Codes/WiFi laden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nixieInit()</text:p>
          </table:table-cell>
          <table:table-cell table:style-name="TD">
            <text:p text:style-name="TableP">I²C starten, alle 4 MCP23017 auf Output, alle Bits 0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Rtc.Begin() + readRTC()</text:p>
          </table:table-cell>
          <table:table-cell table:style-name="TD_Alt">
            <text:p text:style-name="TableP">DS1302 starten, Uhrzeit in curHour/Min/Sec laden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setupWifi()</text:p>
          </table:table-cell>
          <table:table-cell table:style-name="TD">
            <text:p text:style-name="TableP">AP starten; STA verbinden falls creds vorhanden; NTP konfigurieren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setupWebServer()</text:p>
          </table:table-cell>
          <table:table-cell table:style-name="TD_Alt">
            <text:p text:style-name="TableP">Alle 16 API-Routen registrieren, server.begin()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irrecv.enableIRIn()</text:p>
          </table:table-cell>
          <table:table-cell table:style-name="TD">
            <text:p text:style-name="TableP">IR-Empfänger aktivieren (GPIO48)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startFadeIn = true</text:p>
          </table:table-cell>
          <table:table-cell table:style-name="TD_Alt">
            <text:p text:style-name="TableP">Fade-In-Flag setzen → Röhren blenden in loop() ein</text:p>
          </table:table-cell>
        </table:table-row>
      </table:table>
      <text:p text:style-name="Text_Body"/>
      <text:h text:style-name="Heading_2" text:outline-level="2">Globale State-Variablen</text:h>
      <table:table table:style-name="TableStyle">
        <table:table-column table:style-name="Col4p0"/>
        <table:table-column table:style-name="Col2p5"/>
        <table:table-column table:style-name="Col9p5"/>
        <table:table-row>
          <table:table-cell table:style-name="TH">
            <text:p text:style-name="TableH">Variable</text:p>
          </table:table-cell>
          <table:table-cell table:style-name="TH">
            <text:p text:style-name="TableH">Typ</text:p>
          </table:table-cell>
          <table:table-cell table:style-name="TH">
            <text:p text:style-name="TableH">Beschreibung</text:p>
          </table:table-cell>
        </table:table-row>
        <table:table-row>
          <table:table-cell table:style-name="TD">
            <text:p text:style-name="TableP">displayDigits[6]</text:p>
          </table:table-cell>
          <table:table-cell table:style-name="TD">
            <text:p text:style-name="TableP">uint8_t[6]</text:p>
          </table:table-cell>
          <table:table-cell table:style-name="TD">
            <text:p text:style-name="TableP">Aktuell angezeigte Ziffern (0–9; 10 = blank)</text:p>
          </table:table-cell>
        </table:table-row>
        <table:table-row>
          <table:table-cell table:style-name="TD_Alt">
            <text:p text:style-name="TableP">brightLevel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Helligkeitsstufe 0–3 (Index in BRIGHTNESS_LEVELS[])</text:p>
          </table:table-cell>
        </table:table-row>
        <table:table-row>
          <table:table-cell table:style-name="TD">
            <text:p text:style-name="TableP">neoBright</text:p>
          </table:table-cell>
          <table:table-cell table:style-name="TD">
            <text:p text:style-name="TableP">uint8_t</text:p>
          </table:table-cell>
          <table:table-cell table:style-name="TD">
            <text:p text:style-name="TableP">NeoPixel-Feinwert 10–255 (Hintergrund Pixel 0–5)</text:p>
          </table:table-cell>
        </table:table-row>
        <table:table-row>
          <table:table-cell table:style-name="TD_Alt">
            <text:p text:style-name="TableP">colonBrigh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NeoPixel-Feinwert (Trennpunkte Pixel 6–9)</text:p>
          </table:table-cell>
        </table:table-row>
        <table:table-row>
          <table:table-cell table:style-name="TD">
            <text:p text:style-name="TableP">neoHue</text:p>
          </table:table-cell>
          <table:table-cell table:style-name="TD">
            <text:p text:style-name="TableP">uint8_t</text:p>
          </table:table-cell>
          <table:table-cell table:style-name="TD">
            <text:p text:style-name="TableP">Auto-inkrement für Rainbow-Farbverlauf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AnimMode</text:p>
          </table:table-cell>
          <table:table-cell table:style-name="TD_Alt">
            <text:p text:style-name="TableP">Aktueller Animationsmodus (Enum, s. u.)</text:p>
          </table:table-cell>
        </table:table-row>
        <table:table-row>
          <table:table-cell table:style-name="TD">
            <text:p text:style-name="TableP">editState</text:p>
          </table:table-cell>
          <table:table-cell table:style-name="TD">
            <text:p text:style-name="TableP">EditState</text:p>
          </table:table-cell>
          <table:table-cell table:style-name="TD">
            <text:p text:style-name="TableP">Aktueller Einstellschritt (NONE/HOUR/MIN/SEC)</text:p>
          </table:table-cell>
        </table:table-row>
        <table:table-row>
          <table:table-cell table:style-name="TD_Alt">
            <text:p text:style-name="TableP">colonAlways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Trennpunkte dauerhaft an (kein Blinken)</text:p>
          </table:table-cell>
        </table:table-row>
        <table:table-row>
          <table:table-cell table:style-name="TD">
            <text:p text:style-name="TableP">colonStatic</text:p>
          </table:table-cell>
          <table:table-cell table:style-name="TD">
            <text:p text:style-name="TableP">bool</text:p>
          </table:table-cell>
          <table:table-cell table:style-name="TD">
            <text:p text:style-name="TableP">Trennpunkte statisch (Variante 2)</text:p>
          </table:table-cell>
        </table:table-row>
        <table:table-row>
          <table:table-cell table:style-name="TD_Alt">
            <text:p text:style-name="TableP">irCodes[7]</text:p>
          </table:table-cell>
          <table:table-cell table:style-name="TD_Alt">
            <text:p text:style-name="TableP">uint64_t[7]</text:p>
          </table:table-cell>
          <table:table-cell table:style-name="TD_Alt">
            <text:p text:style-name="TableP">Angelernte IR-Codes, Index = IrAction-Enum (0–6)</text:p>
          </table:table-cell>
        </table:table-row>
        <table:table-row>
          <table:table-cell table:style-name="TD">
            <text:p text:style-name="TableP">wifiStaConnected</text:p>
          </table:table-cell>
          <table:table-cell table:style-name="TD">
            <text:p text:style-name="TableP">bool</text:p>
          </table:table-cell>
          <table:table-cell table:style-name="TD">
            <text:p text:style-name="TableP">STA-Verbindung zum Heimnetz aktiv</text:p>
          </table:table-cell>
        </table:table-row>
        <table:table-row>
          <table:table-cell table:style-name="TD_Alt">
            <text:p text:style-name="TableP">ntpSync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NTP-Synchronisierung erfolgreich</text:p>
          </table:table-cell>
        </table:table-row>
        <table:table-row>
          <table:table-cell table:style-name="TD">
            <text:p text:style-name="TableP">slotActive</text:p>
          </table:table-cell>
          <table:table-cell table:style-name="TD">
            <text:p text:style-name="TableP">bool</text:p>
          </table:table-cell>
          <table:table-cell table:style-name="TD">
            <text:p text:style-name="TableP">Slot-Machine-Animation läuft</text:p>
          </table:table-cell>
        </table:table-row>
        <table:table-row>
          <table:table-cell table:style-name="TD_Alt">
            <text:p text:style-name="TableP">startFadeI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Einblend-Sequenz beim Start aktiv</text:p>
          </table:table-cell>
        </table:table-row>
      </table:table>
      <text:p text:style-name="Text_Body"/>
      <text:h text:style-name="Heading_2" text:outline-level="2">Enumerationen</text:h>
      <text:p text:style-name="Code">enum AnimMode  { ANIM_RAINBOW, ANIM_STATIC, ANIM_PULSE, ANIM_SLOTS, ANIM_COUNT };</text:p>
      <text:p text:style-name="Code">enum EditState { EDIT_NONE, EDIT_HOUR, EDIT_MIN, EDIT_SEC };</text:p>
      <text:p text:style-name="Code">enum IrAction  {</text:p>
      <text:p text:style-name="Code">    IR_LEARN_NONE = -1,</text:p>
      <text:p text:style-name="Code">    IR_ACTION_SET = 0, IR_ACTION_UP = 1, IR_ACTION_DOWN = 2,</text:p>
      <text:p text:style-name="Code">    IR_ACTION_BRIGHTNESS = 3, IR_ACTION_ANIM_NEXT = 4,</text:p>
      <text:p text:style-name="Code">    IR_ACTION_SLOT = 5, IR_ACTION_COLON_TOGGLE = 6,</text:p>
      <text:p text:style-name="Code">    IR_ACTION_COUNT = 7</text:p>
      <text:p text:style-name="Code">};</text:p>
      <text:h text:style-name="Heading_2" text:outline-level="2">nixie_driver.ino – Direkte MCP23017-Ansteuerung</text:h>
      <text:p text:style-name="Text_Body">Der Nixie-Treiber implementiert die direkte, multiplexingfreie Ansteuerung der 6 Röhren. Kernfunktionen:</text:p>
      <text:h text:style-name="Heading_3" text:outline-level="3">nixieInit()</text:h>
      <text:p text:style-name="Text_Body">Initialisiert den I²C-Bus (Wire.begin(SDA=8, SCL=9)) und konfiguriert alle vier MCP23017 durch Schreiben von 0x00 in die IODIRA- (0x00) und IODIRB- (0x01) Register — alle 16 Pins werden zu Ausgängen. Anschließend werden alle Ausgänge auf LOW (0) gesetzt und ein FreeRTOS-Mutex (nixieMutex) für thread-sichere Zugriffe erstellt.</text:p>
      <text:h text:style-name="Heading_3" text:outline-level="3">nixieWrite(uint8_t digits[6])</text:h>
      <text:p text:style-name="Text_Body">Berechnet für jede der 6 Röhren das zugehörige MCP-Bit via `digitPin[tube][digit]`-Lookup (O(1)), baut den neuen Zustand in `newState[4]` auf und schreibt nur die MCPs, deren Shadow-Register (`mcpState[]`) sich geändert haben — minimiert I²C-Traffic. Der gesamte Zugriff ist durch den FreeRTOS-Mutex geschützt, da nixieWrite() sowohl aus dem Loop-Task als auch aus dem asynchronen Web-Server-Task aufgerufen werden kann.</text:p>
      <text:p text:style-name="Code">// Einziger I²C-Schreibzugriff pro geändertem MCP (beide Ports gleichzeitig):</text:p>
      <text:p text:style-name="Code">Wire.beginTransmission(addr);</text:p>
      <text:p text:style-name="Code">Wire.write(MCP_OLATA);          // Register 0x14</text:p>
      <text:p text:style-name="Code">Wire.write((uint8_t)(val &amp; 0xFF));     // GPA (Low-Byte)</text:p>
      <text:p text:style-name="Code">Wire.write((uint8_t)((val &gt;&gt; 8)&amp;0xFF));// GPB (High-Byte)</text:p>
      <text:p text:style-name="Code">Wire.endTransmission();</text:p>
      <text:h text:style-name="Heading_2" text:outline-level="2">Web-API (16 Endpunkte)</text:h>
      <text:p text:style-name="Text_Body">Der HTTP-Server läuft auf Port 80, im AP-Modus unter 192.168.4.1, im STA-Modus zusätzlich unter der Heimnetz-IP. POST-Endpunkte erwarten JSON (Content-Type: application/json).</text:p>
      <table:table table:style-name="TableStyle">
        <table:table-column table:style-name="Col4p0"/>
        <table:table-column table:style-name="Col1p8"/>
        <table:table-column table:style-name="Col10p2"/>
        <table:table-row>
          <table:table-cell table:style-name="TH">
            <text:p text:style-name="TableH">Pfad</text:p>
          </table:table-cell>
          <table:table-cell table:style-name="TH">
            <text:p text:style-name="TableH">Methode</text:p>
          </table:table-cell>
          <table:table-cell table:style-name="TH">
            <text:p text:style-name="TableH">Request-Body / Antwort</text:p>
          </table:table-cell>
        </table:table-row>
        <table:table-row>
          <table:table-cell table:style-name="TD">
            <text:p text:style-name="TableP">/</text:p>
          </table:table-cell>
          <table:table-cell table:style-name="TD">
            <text:p text:style-name="TableP">GET</text:p>
          </table:table-cell>
          <table:table-cell table:style-name="TD">
            <text:p text:style-name="TableP">Vollständiges Web-Interface (HTML/CSS/JS eingebettet)</text:p>
          </table:table-cell>
        </table:table-row>
        <table:table-row>
          <table:table-cell table:style-name="TD_Alt">
            <text:p text:style-name="TableP">/api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h, m, s, brightLevel, neoBright, animMode, wifiSta, ntpSynced}</text:p>
          </table:table-cell>
        </table:table-row>
        <table:table-row>
          <table:table-cell table:style-name="TD">
            <text:p text:style-name="TableP">/api/settime</text:p>
          </table:table-cell>
          <table:table-cell table:style-name="TD">
            <text:p text:style-name="TableP">POST</text:p>
          </table:table-cell>
          <table:table-cell table:style-name="TD">
            <text:p text:style-name="TableP">{"h":H, "m":M, "s":S}  → Zeit in DS1302 schreiben</text:p>
          </table:table-cell>
        </table:table-row>
        <table:table-row>
          <table:table-cell table:style-name="TD_Alt">
            <text:p text:style-name="TableP">/api/brigh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level":0..3}  → Helligkeitsstufe</text:p>
          </table:table-cell>
        </table:table-row>
        <table:table-row>
          <table:table-cell table:style-name="TD">
            <text:p text:style-name="TableP">/api/neobright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10..255}  → NeoPixel-Feinwert</text:p>
          </table:table-cell>
        </table:table-row>
        <table:table-row>
          <table:table-cell table:style-name="TD_Alt">
            <text:p text:style-name="TableP">/api/anim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mode":0..3}  → Animationsmodus</text:p>
          </table:table-cell>
        </table:table-row>
        <table:table-row>
          <table:table-cell table:style-name="TD">
            <text:p text:style-name="TableP">/api/colonbright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1..100}  → Trennpunkt-Helligkeit</text:p>
          </table:table-cell>
        </table:table-row>
        <table:table-row>
          <table:table-cell table:style-name="TD_Alt">
            <text:p text:style-name="TableP">/api/colonon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enabled":true|false}  → Dauerhaft an/aus</text:p>
          </table:table-cell>
        </table:table-row>
        <table:table-row>
          <table:table-cell table:style-name="TD">
            <text:p text:style-name="TableP">/api/colonstatic</text:p>
          </table:table-cell>
          <table:table-cell table:style-name="TD">
            <text:p text:style-name="TableP">POST</text:p>
          </table:table-cell>
          <table:table-cell table:style-name="TD">
            <text:p text:style-name="TableP">{"enabled":true|false}  → Statisch (kein Blinken)</text:p>
          </table:table-cell>
        </table:table-row>
        <table:table-row>
          <table:table-cell table:style-name="TD_Alt">
            <text:p text:style-name="TableP">/api/slo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(kein Body) → Slot-Machine-Animation starten</text:p>
          </table:table-cell>
        </table:table-row>
        <table:table-row>
          <table:table-cell table:style-name="TD">
            <text:p text:style-name="TableP">/api/wifi</text:p>
          </table:table-cell>
          <table:table-cell table:style-name="TD">
            <text:p text:style-name="TableP">GET</text:p>
          </table:table-cell>
          <table:table-cell table:style-name="TD">
            <text:p text:style-name="TableP">{apIP, staIP, staConnected, ntpSynced}</text:p>
          </table:table-cell>
        </table:table-row>
        <table:table-row>
          <table:table-cell table:style-name="TD_Alt">
            <text:p text:style-name="TableP">/api/wifi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ssid":"…", "pass":"…"}  → STA verbinden, Neustart</text:p>
          </table:table-cell>
        </table:table-row>
        <table:table-row>
          <table:table-cell table:style-name="TD">
            <text:p text:style-name="TableP">/api/wifi/scan</text:p>
          </table:table-cell>
          <table:table-cell table:style-name="TD">
            <text:p text:style-name="TableP">GET</text:p>
          </table:table-cell>
          <table:table-cell table:style-name="TD">
            <text:p text:style-name="TableP">JSON-Array verfügbarer WLANs</text:p>
          </table:table-cell>
        </table:table-row>
        <table:table-row>
          <table:table-cell table:style-name="TD_Alt">
            <text:p text:style-name="TableP">/api/ir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7 IR-Code-Einträge (je action + code)</text:p>
          </table:table-cell>
        </table:table-row>
        <table:table-row>
          <table:table-cell table:style-name="TD">
            <text:p text:style-name="TableP">/api/ir/learn</text:p>
          </table:table-cell>
          <table:table-cell table:style-name="TD">
            <text:p text:style-name="TableP">POST</text:p>
          </table:table-cell>
          <table:table-cell table:style-name="TD">
            <text:p text:style-name="TableP">{"action":"SET"|"UP"|"DOWN"|"BRIGHTNESS"|"ANIM_NEXT"|"SLOT"|"COLON_TOGGLE"}</text:p>
          </table:table-cell>
        </table:table-row>
        <table:table-row>
          <table:table-cell table:style-name="TD_Alt">
            <text:p text:style-name="TableP">/api/ir/clear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action":"…"}  → IR-Code löschen</text:p>
          </table:table-cell>
        </table:table-row>
      </table:table>
      <text:p text:style-name="Text_Body"/>
      <text:h text:style-name="Heading_2" text:outline-level="2">NVS-Persistenz</text:h>
      <text:p text:style-name="Text_Body">Alle Einstellungen werden über die Arduino-`Preferences`-Bibliothek im ESP32-NVS-Flash gespeichert (Namespace "nixie"). Beim Start werden sie automatisch geladen.</text:p>
      <table:table table:style-name="TableStyle">
        <table:table-column table:style-name="Col3p0"/>
        <table:table-column table:style-name="Col1p8"/>
        <table:table-column table:style-name="Col2p0"/>
        <table:table-column table:style-name="Col9p2"/>
        <table:table-row>
          <table:table-cell table:style-name="TH">
            <text:p text:style-name="TableH">NVS-Schlüssel</text:p>
          </table:table-cell>
          <table:table-cell table:style-name="TH">
            <text:p text:style-name="TableH">Typ</text:p>
          </table:table-cell>
          <table:table-cell table:style-name="TH">
            <text:p text:style-name="TableH">Default</text:p>
          </table:table-cell>
          <table:table-cell table:style-name="TH">
            <text:p text:style-name="TableH">Inhalt</text:p>
          </table:table-cell>
        </table:table-row>
        <table:table-row>
          <table:table-cell table:style-name="TD">
            <text:p text:style-name="TableP">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3</text:p>
          </table:table-cell>
          <table:table-cell table:style-name="TD">
            <text:p text:style-name="TableP">Helligkeitsstufe (0–3)</text:p>
          </table:table-cell>
        </table:table-row>
        <table:table-row>
          <table:table-cell table:style-name="TD_Alt">
            <text:p text:style-name="TableP">neoBright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30</text:p>
          </table:table-cell>
          <table:table-cell table:style-name="TD_Alt">
            <text:p text:style-name="TableP">NeoPixel-Feinwert Hintergrund</text:p>
          </table:table-cell>
        </table:table-row>
        <table:table-row>
          <table:table-cell table:style-name="TD">
            <text:p text:style-name="TableP">colon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15</text:p>
          </table:table-cell>
          <table:table-cell table:style-name="TD">
            <text:p text:style-name="TableP">NeoPixel-Feinwert Trennpunkte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Animationsmodus (0=Rainbow, 1=Statisch, 2=Puls, 3=Slots)</text:p>
          </table:table-cell>
        </table:table-row>
        <table:table-row>
          <table:table-cell table:style-name="TD">
            <text:p text:style-name="TableP">colonO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Trennpunkte dauerhaft an</text:p>
          </table:table-cell>
        </table:table-row>
        <table:table-row>
          <table:table-cell table:style-name="TD_Alt">
            <text:p text:style-name="TableP">colonStatic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Trennpunkte statisch</text:p>
          </table:table-cell>
        </table:table-row>
        <table:table-row>
          <table:table-cell table:style-name="TD">
            <text:p text:style-name="TableP">wifiSsid</text:p>
          </table:table-cell>
          <table:table-cell table:style-name="TD">
            <text:p text:style-name="TableP">String</text:p>
          </table:table-cell>
          <table:table-cell table:style-name="TD">
            <text:p text:style-name="TableP">""</text:p>
          </table:table-cell>
          <table:table-cell table:style-name="TD">
            <text:p text:style-name="TableP">Heimnetz SSID</text:p>
          </table:table-cell>
        </table:table-row>
        <table:table-row>
          <table:table-cell table:style-name="TD_Alt">
            <text:p text:style-name="TableP">wifiPass</text:p>
          </table:table-cell>
          <table:table-cell table:style-name="TD_Alt">
            <text:p text:style-name="TableP">String</text:p>
          </table:table-cell>
          <table:table-cell table:style-name="TD_Alt">
            <text:p text:style-name="TableP">""</text:p>
          </table:table-cell>
          <table:table-cell table:style-name="TD_Alt">
            <text:p text:style-name="TableP">Heimnetz Passwort</text:p>
          </table:table-cell>
        </table:table-row>
        <table:table-row>
          <table:table-cell table:style-name="TD">
            <text:p text:style-name="TableP">ir_SE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SET</text:p>
          </table:table-cell>
        </table:table-row>
        <table:table-row>
          <table:table-cell table:style-name="TD_Alt">
            <text:p text:style-name="TableP">ir_UP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UP</text:p>
          </table:table-cell>
        </table:table-row>
        <table:table-row>
          <table:table-cell table:style-name="TD">
            <text:p text:style-name="TableP">ir_DOWN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DOWN</text:p>
          </table:table-cell>
        </table:table-row>
        <table:table-row>
          <table:table-cell table:style-name="TD_Alt">
            <text:p text:style-name="TableP">ir_BRIGHTNESS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BRIGHTNESS</text:p>
          </table:table-cell>
        </table:table-row>
        <table:table-row>
          <table:table-cell table:style-name="TD">
            <text:p text:style-name="TableP">ir_ANIM_NEX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ANIM_NEXT</text:p>
          </table:table-cell>
        </table:table-row>
        <table:table-row>
          <table:table-cell table:style-name="TD_Alt">
            <text:p text:style-name="TableP">ir_SLO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SLOT</text:p>
          </table:table-cell>
        </table:table-row>
        <table:table-row>
          <table:table-cell table:style-name="TD">
            <text:p text:style-name="TableP">ir_COLTOGGLE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COLON_TOGGLE</text:p>
          </table:table-cell>
        </table:table-row>
      </table:table>
      <text:p text:style-name="Text_Body"/>
      <text:p text:style-name="PageBreak"/>
      <text:h text:style-name="Heading_1" text:outline-level="1">Entwickler-Workflow</text:h>
      <text:h text:style-name="Heading_2" text:outline-level="2">Arduino IDE einrichten</text:h>
      <text:p text:style-name="Text_Body">Voraussetzung: Arduino IDE 2.x. ESP32-Boardunterstützung installieren:</text:p>
      <text:p text:style-name="Code">Datei → Einstellungen → Zusätzliche Boardverwalter-URLs:</text:p>
      <text:p text:style-name="Code">https://raw.githubusercontent.com/espressif/arduino-esp32/gh-pages/package_esp32_index.json</text:p>
      <text:p text:style-name="Text_Body">Dann: Werkzeuge → Board → Boardverwalter → «esp32» suchen → Paket von Espressif Systems installieren (Version 3.x). Board auswählen: ESP32S3 Dev Module.</text:p>
      <text:h text:style-name="Heading_2" text:outline-level="2">Bibliotheken installieren</text:h>
      <text:p text:style-name="Text_Body">Alle Bibliotheken über den Arduino Library Manager installieren (Werkzeuge → Bibliotheken verwalten):</text:p>
      <table:table table:style-name="TableStyle">
        <table:table-column table:style-name="Col7p0"/>
        <table:table-column table:style-name="Col9p0"/>
        <table:table-row>
          <table:table-cell table:style-name="TH">
            <text:p text:style-name="TableH">Bibliothek</text:p>
          </table:table-cell>
          <table:table-cell table:style-name="TH">
            <text:p text:style-name="TableH">Suchbegriff im Library Manager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 NeoPixel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Rtc by Makuna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AsyncTCP (me-no-dev)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ESPAsyncWebServer (me-no-dev)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ArduinoJson (v6.x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IRremoteESP8266</text:p>
          </table:table-cell>
        </table:table-row>
      </table:table>
      <text:p text:style-name="Text_Body"/>
      <text:p text:style-name="Note">⚠ ArduinoJson: Explizit Version 6.x wählen — Version 7 ist API-inkompatibel.</text:p>
      <text:h text:style-name="Heading_2" text:outline-level="2">Firmware flashen</text:h>
      <text:p text:style-name="Text_Body">1. Micro-USB-Kabel am Logic Board J2 anschließen (5 V + Datenleitungen).</text:p>
      <text:p text:style-name="Text_Body">2. Falls der COM-Port nicht erkannt wird: BOOT-Taster (SW5) beim Einschalten gedrückt halten.</text:p>
      <text:p text:style-name="Text_Body">3. In der Arduino IDE: Werkzeuge → Board → ESP32S3 Dev Module, Upload Speed 921600, Flash Size 4 MB (32 Mb).</text:p>
      <text:p text:style-name="Text_Body">4. Sketch → Hochladen (oder Strg+U).</text:p>
      <text:h text:style-name="Heading_2" text:outline-level="2">Serial Monitor / Debugging</text:h>
      <text:p text:style-name="Text_Body">Baudrate: 115200. Nach dem Start gibt die Firmware auf dem seriellen Monitor den Initialisierungsablauf aus, u.a.:</text:p>
      <text:p text:style-name="Code">[Nixie] MCP23017 initialisiert.</text:p>
      <text:p text:style-name="Code">[WiFi] AP gestartet: 192.168.4.1</text:p>
      <text:p text:style-name="Code">[WiFi] STA verbunden: 192.168.1.42</text:p>
      <text:p text:style-name="Code">[NTP] Synchronisiert: 14:32:07</text:p>
      <text:h text:style-name="Heading_2" text:outline-level="2">Häufige Probleme</text:h>
      <table:table table:style-name="TableStyle">
        <table:table-column table:style-name="Col4p5"/>
        <table:table-column table:style-name="Col4p5"/>
        <table:table-column table:style-name="Col7p0"/>
        <table:table-row>
          <table:table-cell table:style-name="TH">
            <text:p text:style-name="TableH">Symptom</text:p>
          </table:table-cell>
          <table:table-cell table:style-name="TH">
            <text:p text:style-name="TableH">Ursache</text:p>
          </table:table-cell>
          <table:table-cell table:style-name="TH">
            <text:p text:style-name="TableH">Lösung</text:p>
          </table:table-cell>
        </table:table-row>
        <table:table-row>
          <table:table-cell table:style-name="TD">
            <text:p text:style-name="TableP">Röhren leuchten nicht</text:p>
          </table:table-cell>
          <table:table-cell table:style-name="TD">
            <text:p text:style-name="TableP">HV-MOD liefert keine Spannung</text:p>
          </table:table-cell>
          <table:table-cell table:style-name="TD">
            <text:p text:style-name="TableP">5-V-Versorgung und HV-MOD prüfen; Spannungsmessung an J4</text:p>
          </table:table-cell>
        </table:table-row>
        <table:table-row>
          <table:table-cell table:style-name="TD_Alt">
            <text:p text:style-name="TableP">Ghosting / Doppelziffern</text:p>
          </table:table-cell>
          <table:table-cell table:style-name="TD_Alt">
            <text:p text:style-name="TableP">I²C-Fehler, MCP nicht antwortend</text:p>
          </table:table-cell>
          <table:table-cell table:style-name="TD_Alt">
            <text:p text:style-name="TableP">I²C-Bus prüfen (Pull-ups R65–R70), Serial Monitor auf Fehlermeldungen</text:p>
          </table:table-cell>
        </table:table-row>
        <table:table-row>
          <table:table-cell table:style-name="TD">
            <text:p text:style-name="TableP">Web-UI nicht erreichbar</text:p>
          </table:table-cell>
          <table:table-cell table:style-name="TD">
            <text:p text:style-name="TableP">WiFi AP nicht gestartet</text:p>
          </table:table-cell>
          <table:table-cell table:style-name="TD">
            <text:p text:style-name="TableP">Serial Monitor prüfen; auf 192.168.4.1 verbinden</text:p>
          </table:table-cell>
        </table:table-row>
        <table:table-row>
          <table:table-cell table:style-name="TD_Alt">
            <text:p text:style-name="TableP">Uhrzeit falsch nach Reset</text:p>
          </table:table-cell>
          <table:table-cell table:style-name="TD_Alt">
            <text:p text:style-name="TableP">RTC leer / Batterie schwach</text:p>
          </table:table-cell>
          <table:table-cell table:style-name="TD_Alt">
            <text:p text:style-name="TableP">Zeit über Web-UI stellen; CR2032 BT1 prüfen</text:p>
          </table:table-cell>
        </table:table-row>
        <table:table-row>
          <table:table-cell table:style-name="TD">
            <text:p text:style-name="TableP">Kompilierungsfehler JSON</text:p>
          </table:table-cell>
          <table:table-cell table:style-name="TD">
            <text:p text:style-name="TableP">ArduinoJson v7 installiert</text:p>
          </table:table-cell>
          <table:table-cell table:style-name="TD">
            <text:p text:style-name="TableP">ArduinoJson auf v6.x downgraden</text:p>
          </table:table-cell>
        </table:table-row>
        <table:table-row>
          <table:table-cell table:style-name="TD_Alt">
            <text:p text:style-name="TableP">IR-Fernbedienung reagiert nicht</text:p>
          </table:table-cell>
          <table:table-cell table:style-name="TD_Alt">
            <text:p text:style-name="TableP">Code noch nicht angelernt</text:p>
          </table:table-cell>
          <table:table-cell table:style-name="TD_Alt">
            <text:p text:style-name="TableP">Im Web-UI unter IR-Fernbedienung Codes anlernen</text:p>
          </table:table-cell>
        </table:table-row>
      </table:table>
      <text:p text:style-name="Text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office:version="1.3">
  <office:styles>
    <!-- Seitenlayout A4 -->
    <style:style style:name="PageLayout" style:family="page-layout">
      <style:page-layout-properties fo:page-width="21cm" fo:page-height="29.7cm" fo:margin-top="2.5cm" fo:margin-bottom="2.5cm" fo:margin-left="2.5cm" fo:margin-right="2.5cm"/>
    </style:style>
    <!-- Absatzstile -->
    <style:style style:name="Title" style:family="paragraph">
      <style:paragraph-properties fo:text-align="center" fo:margin-top="6cm" fo:margin-bottom="0.5cm"/>
      <style:text-properties fo:font-size="28pt" fo:font-weight="bold" fo:color="#1a2440"/>
    </style:style>
    <style:style style:name="Subtitle" style:family="paragraph">
      <style:paragraph-properties fo:text-align="center" fo:margin-bottom="0.4cm"/>
      <style:text-properties fo:font-size="14pt" fo:color="#444444"/>
    </style:style>
    <style:style style:name="TitleMeta" style:family="paragraph">
      <style:paragraph-properties fo:text-align="center" fo:margin-bottom="0.2cm"/>
      <style:text-properties fo:font-size="11pt" fo:color="#666666"/>
    </style:style>
    <style:style style:name="Heading_1" style:family="paragraph">
      <style:paragraph-properties fo:margin-top="0.8cm" fo:margin-bottom="0.4cm" fo:keep-with-next="always"/>
      <style:text-properties fo:font-size="18pt" fo:font-weight="bold" fo:color="#1a2440"/>
    </style:style>
    <style:style style:name="Heading_2" style:family="paragraph">
      <style:paragraph-properties fo:margin-top="0.6cm" fo:margin-bottom="0.3cm" fo:keep-with-next="always"/>
      <style:text-properties fo:font-size="14pt" fo:font-weight="bold" fo:color="#1a3060"/>
    </style:style>
    <style:style style:name="Heading_3" style:family="paragraph">
      <style:paragraph-properties fo:margin-top="0.4cm" fo:margin-bottom="0.2cm" fo:keep-with-next="always"/>
      <style:text-properties fo:font-size="12pt" fo:font-weight="bold" fo:color="#2a4080"/>
    </style:style>
    <style:style style:name="Text_Body" style:family="paragraph">
      <style:paragraph-properties fo:margin-top="0.1cm" fo:margin-bottom="0.2cm" fo:text-align="justify" fo:line-height="140%"/>
      <style:text-properties fo:font-size="10.5pt"/>
    </style:style>
    <style:style style:name="Caption" style:family="paragraph">
      <style:paragraph-properties fo:text-align="center" fo:margin-bottom="0.3cm" fo:margin-top="0.1cm"/>
      <style:text-properties fo:font-size="9pt" fo:color="#555555"/>
    </style:style>
    <style:style style:name="Code" style:family="paragraph">
      <style:paragraph-properties fo:margin-left="1cm" fo:margin-top="0.05cm" fo:margin-bottom="0.05cm" fo:background-color="#f3f3f3"/>
      <style:text-properties fo:font-family="Liberation Mono" fo:font-size="9pt" fo:color="#1a1a1a"/>
    </style:style>
    <style:style style:name="Note" style:family="paragraph">
      <style:paragraph-properties fo:margin-top="0.2cm" fo:margin-bottom="0.2cm" fo:margin-left="0.5cm" fo:background-color="#fff8e0" fo:border="0.5pt solid #c8a000" fo:padding="0.2cm"/>
      <style:text-properties fo:font-size="10pt" fo:color="#5a4000"/>
    </style:style>
    <style:style style:name="PageBreak" style:family="paragraph">
      <style:paragraph-properties fo:break-after="page"/>
      <style:text-properties fo:font-size="1pt"/>
    </style:style>
    <style:style style:name="TableH" style:family="paragraph">
      <style:text-properties fo:font-size="10pt" fo:font-weight="bold" fo:color="#ffffff"/>
    </style:style>
    <style:style style:name="TableP" style:family="paragraph">
      <style:text-properties fo:font-size="9.5pt"/>
    </style:style>
    <style:style style:name="Italic" style:family="text">
      <style:text-properties fo:font-style="italic"/>
    </style:style>
    <style:style style:name="Graphics" style:family="graphic">
      <style:graphic-properties fo:margin-top="0.3cm" fo:margin-bottom="0.1cm"/>
    </style:style>
  </office:styles>
  <office:master-styles>
    <style:master-page style:name="Standard" style:page-layout-name="PageLayout">
      <style:footer>
        <text:p text:style-name="TitleMeta">
        Nixie Clock Ultra — Systemdokumentation
        <text:tab/><text:tab/><text:tab/>
        Seite <text:page-number/>
      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dc:title>Nixie Clock Ultra – Systemdokumentation</dc:title>
    <dc:creator>broed digital media</dc:creator>
    <dc:date>2026-06-16</dc:date>
    <meta:generator>gen_sysdoc.py</meta:generator>
  </office:meta>
</office:document-meta>
</file>