
<file path=META-INF/manifest.xml><?xml version="1.0" encoding="utf-8"?>
<manifest:manifest xmlns:manifest="urn:oasis:names:tc:opendocument:xmlns:manifest:1.0" manifest:version="1.3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3">
  <office:automatic-styles/>
  <office:body>
    <office:text>
      <text:p text:style-name="Title">Nixie Clock Ultra</text:p>
      <text:p text:style-name="Tagline">wenn Zeit leuchtet</text:p>
      <text:p text:style-name="Subtitle">Handgefertigte Röhrenuhr · ESP32-S3 · 6 × IN-12A · WiFi &amp; Web-Interface</text:p>
      <text:h text:style-name="Heading_1" text:outline-level="1">Eine Uhr, die man nicht kauft, weil man die Zeit nicht kennt</text:h>
      <text:p text:style-name="Text_Body">Nixie-Röhren gehören zu den faszinierendsten Anzeigetechnologien, die je entwickelt wurden: warmes, leicht diffuses Licht, das Ziffern plastisch aus dem Glas herausleuchten lässt — unverwechselbar, zeitlos und heute begehrter denn je. Die Nixie Clock Ultra bringt dieses Feeling ins 21. Jahrhundert, ohne seinen Charakter zu verlieren.</text:p>
      <text:p text:style-name="Text_Body">Sechs IN-12A-Nixieröhren zeigen Stunden, Minuten und Sekunden — und auf Wunsch auch das Datum. Hinter jeder Röhre sitzt eine individuell ansteuerbare RGB-LED, die das Glas von innen in warmem Licht erstrahlen lässt: statisch, im sanften Atemrhythmus oder als fließendes Farbspektrum. Vier weitere LEDs beleuchten die Trennpunkte zwischen den Zifferngruppen.</text:p>
      <text:p text:style-name="Text_Body">Was diese Uhr von den meisten anderen Nixie-Projekten unterscheidet, ist die Art der Röhrenansteuerung: Kein Multiplexing, keine Kompromisse. Jede der 60 Kathoden besitzt ihren eigenen Hochvolt-Transistor — die Ziffern leuchten dauerhaft, ohne jegliches Ghosting oder Flimmern. Das Ergebnis ist ein sauberes, stabiles Bild, das man sofort sieht und lange nicht vergisst.</text:p>
      <text:p text:style-name="Text_Body">Die Uhr denkt mit: Ein ESP32-S3 verbindet sich mit dem Heimnetz, synchronisiert die Uhrzeit vollautomatisch per NTP aus dem Internet und ist über jeden Browser erreichbar — kein App-Download, kein Pairing. Über das Web-Interface lassen sich Helligkeit, Farben, Animationen, Nacht-Modus und vieles mehr bequem einstellen. Wer lieber zur Fernbedienung greift: fast jede handelsübliche IR-Fernbedienung lässt sich anlernen.</text:p>
      <text:p text:style-name="Text_Body">Für ruhige Nächte sorgt der Nacht-Modus: Die Uhr dimmt sich auf Wunsch zu einer konfigurierbaren Uhrzeit automatisch herunter — oder reagiert direkt auf die Umgebungshelligkeit über einen eingebauten Lichtsensor. Im Dunkelmodus erlöschen die Röhren vollständig.</text:p>
      <text:p text:style-name="Text_Body">Und weil eine Uhr auch eine Uhr sein soll: Die Echtzeituhr mit CR2032-Backup-Batterie hält die Zeit auch bei Stromausfall zuverlässig. Beim nächsten Einschalten zeigt die Nixie Clock Ultra sofort die richtige Zeit — und blendet sie mit einem sanften Fade-In ein.</text:p>
      <text:p text:style-name="Text_Body">Die Nixie Clock Ultra ist ein Unikat — handgefertigte Einzelplatinen, sorgfältig bestückt und getestet. Kein Bausatz, keine Kompromisse. Eine Uhr, die man nicht kauft, weil man die Uhrzeit nicht kennt — sondern weil man sie kennen will.</text:p>
      <text:h text:style-name="Heading_1" text:outline-level="1">Features auf einen Blick</text:h>
      <text:p text:style-name="SectionLabel">Anzeige</text:p>
      <text:list text:style-name="BulletList">
        <text:list-item>
          <text:p text:style-name="ListItem">6 × IN-12A Nixie-Röhren — direkte Kathodensteuerung ohne Multiplexing, kein Ghosting, kein Flimmern</text:p>
        </text:list-item>
      </text:list>
      <text:list text:style-name="BulletList">
        <text:list-item>
          <text:p text:style-name="ListItem">Stunden · Minuten · Sekunden sowie Datumsanzeige (TT MM JJ)</text:p>
        </text:list-item>
      </text:list>
      <text:list text:style-name="BulletList">
        <text:list-item>
          <text:p text:style-name="ListItem">Sanfter Fade-In beim Einschalten</text:p>
        </text:list-item>
      </text:list>
      <text:list text:style-name="BulletList">
        <text:list-item>
          <text:p text:style-name="ListItem">Optional weicher Ziffernwechsel (Crossfade) — einzeln zuschaltbar für Sekundentakt und für den Wechsel zwischen Uhrzeit und Datum</text:p>
        </text:list-item>
      </text:list>
      <text:p text:style-name="SectionLabel">Beleuchtung</text:p>
      <text:list text:style-name="BulletList">
        <text:list-item>
          <text:p text:style-name="ListItem">6 × WS2812B RGB-LEDs als Röhrenhintergrundbeleuchtung (individuell pro Röhre)</text:p>
        </text:list-item>
      </text:list>
      <text:list text:style-name="BulletList">
        <text:list-item>
          <text:p text:style-name="ListItem">4 × WS2812B RGB-LEDs für die Trennpunkt-Beleuchtung</text:p>
        </text:list-item>
      </text:list>
      <text:list text:style-name="BulletList">
        <text:list-item>
          <text:p text:style-name="ListItem">Animationsmodi: Rainbow, Statisch (warmweiß), Puls</text:p>
        </text:list-item>
      </text:list>
      <text:list text:style-name="BulletList">
        <text:list-item>
          <text:p text:style-name="ListItem">Slot-Machine-Effekt: konfigurierbar (aus / alle 10 s / 1 min / 15 min / 1 h), zeigt danach automatisch das Datum</text:p>
        </text:list-item>
      </text:list>
      <text:list text:style-name="BulletList">
        <text:list-item>
          <text:p text:style-name="ListItem">Rollgeschwindigkeit der Slot-Machine-Animation stufenlos einstellbar</text:p>
        </text:list-item>
      </text:list>
      <text:p text:style-name="SectionLabel">Konnektivität &amp; Bedienung</text:p>
      <text:list text:style-name="BulletList">
        <text:list-item>
          <text:p text:style-name="ListItem">ESP32-S3 mit integriertem WLAN (2,4 GHz)</text:p>
        </text:list-item>
      </text:list>
      <text:list text:style-name="BulletList">
        <text:list-item>
          <text:p text:style-name="ListItem">Gleichzeitig eigener WLAN-Accesspoint (kein Heimnetz notwendig) und WLAN-Client</text:p>
        </text:list-item>
      </text:list>
      <text:list text:style-name="BulletList">
        <text:list-item>
          <text:p text:style-name="ListItem">Automatische Zeitsynchronisation per NTP</text:p>
        </text:list-item>
      </text:list>
      <text:list text:style-name="BulletList">
        <text:list-item>
          <text:p text:style-name="ListItem">Vollständiges Web-Interface im Browser — kein App-Download, funktioniert auf Smartphone, Tablet und PC</text:p>
        </text:list-item>
      </text:list>
      <text:list text:style-name="BulletList">
        <text:list-item>
          <text:p text:style-name="ListItem">Erreichbar per IP oder als nixieclockcs.local im Heimnetz (mDNS)</text:p>
        </text:list-item>
      </text:list>
      <text:list text:style-name="BulletList">
        <text:list-item>
          <text:p text:style-name="ListItem">IR-Fernbedienung: 8 Funktionen frei auf jede handelsübliche Fernbedienung anlernbar</text:p>
        </text:list-item>
      </text:list>
      <text:list text:style-name="BulletList">
        <text:list-item>
          <text:p text:style-name="ListItem">4 Bedientaster direkt an der Uhr</text:p>
        </text:list-item>
      </text:list>
      <text:p text:style-name="SectionLabel">Nacht-Modus</text:p>
      <text:list text:style-name="BulletList">
        <text:list-item>
          <text:p text:style-name="ListItem">Zeitgesteuertes Dimmen oder vollständiges Ausschalten der Röhren</text:p>
        </text:list-item>
      </text:list>
      <text:list text:style-name="BulletList">
        <text:list-item>
          <text:p text:style-name="ListItem">Automatische Helligkeitsanpassung über eingebauten Lichtsensor (LDR)</text:p>
        </text:list-item>
      </text:list>
      <text:list text:style-name="BulletList">
        <text:list-item>
          <text:p text:style-name="ListItem">NeoPixel-Helligkeit wird im Nacht-Modus proportional mitgedimmt</text:p>
        </text:list-item>
      </text:list>
      <text:p text:style-name="SectionLabel">Technik</text:p>
      <text:list text:style-name="BulletList">
        <text:list-item>
          <text:p text:style-name="ListItem">Zweiplatinen-Design: Logic Board (ESP32-S3, RTC, Spannungsversorgung) + Nixie Display Board</text:p>
        </text:list-item>
      </text:list>
      <text:list text:style-name="BulletList">
        <text:list-item>
          <text:p text:style-name="ListItem">DS1302 Echtzeituhr mit CR2032-Batterie-Backup — hält Zeit auch ohne Strom</text:p>
        </text:list-item>
      </text:list>
      <text:list text:style-name="BulletList">
        <text:list-item>
          <text:p text:style-name="ListItem">Hochvolt-Versorgung: 5 V USB → DC-DC-Konverter → 10 V → HV-Modul → ~170 V stabile Anodenspannung</text:p>
        </text:list-item>
      </text:list>
      <text:list text:style-name="BulletList">
        <text:list-item>
          <text:p text:style-name="ListItem">60 diskrete SMBTA42-Hochvolt-Transistoren (je eine Kathode, je eine Röhrenziffer)</text:p>
        </text:list-item>
      </text:list>
      <text:list text:style-name="BulletList">
        <text:list-item>
          <text:p text:style-name="ListItem">Alle Einstellungen werden im Flash gespeichert und bleiben nach Stromunterbrechung erhalten</text:p>
        </text:list-item>
      </text:list>
      <text:list text:style-name="BulletList">
        <text:list-item>
          <text:p text:style-name="ListItem">Stromversorgung: Micro-USB, 5 V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xmlns:svg="urn:oasis:names:tc:opendocument:xmlns:svg-compatible:1.0" office:version="1.3">
  <office:styles>
    <style:style style:name="PageLayout" style:family="page-layout">
      <style:page-layout-properties fo:page-width="21cm" fo:page-height="29.7cm" fo:margin-top="3cm" fo:margin-bottom="3cm" fo:margin-left="3cm" fo:margin-right="3cm"/>
    </style:style>
    <style:style style:name="Title" style:family="paragraph">
      <style:paragraph-properties fo:text-align="center" fo:margin-top="4cm" fo:margin-bottom="0.3cm"/>
      <style:text-properties fo:font-size="32pt" fo:font-weight="bold" fo:color="#1a1a2e" fo:letter-spacing="0.1cm"/>
    </style:style>
    <style:style style:name="Tagline" style:family="paragraph">
      <style:paragraph-properties fo:text-align="center" fo:margin-bottom="0.6cm"/>
      <style:text-properties fo:font-size="13pt" fo:color="#8b6914" fo:font-style="italic"/>
    </style:style>
    <style:style style:name="Subtitle" style:family="paragraph">
      <style:paragraph-properties fo:text-align="center" fo:margin-bottom="2cm"/>
      <style:text-properties fo:font-size="11pt" fo:color="#555555"/>
    </style:style>
    <style:style style:name="Heading_1" style:family="paragraph">
      <style:paragraph-properties fo:margin-top="1.2cm" fo:margin-bottom="0.4cm" fo:keep-with-next="always" fo:border-bottom="1.5pt solid #c8a000" fo:padding-bottom="0.15cm"/>
      <style:text-properties fo:font-size="16pt" fo:font-weight="bold" fo:color="#1a1a2e"/>
    </style:style>
    <style:style style:name="Heading_2" style:family="paragraph">
      <style:paragraph-properties fo:margin-top="0.7cm" fo:margin-bottom="0.25cm" fo:keep-with-next="always"/>
      <style:text-properties fo:font-size="11pt" fo:font-weight="bold" fo:color="#8b6914"/>
    </style:style>
    <style:style style:name="Text_Body" style:family="paragraph">
      <style:paragraph-properties fo:margin-top="0.1cm" fo:margin-bottom="0.3cm" fo:text-align="justify" fo:line-height="150%"/>
      <style:text-properties fo:font-size="11pt" fo:color="#222222"/>
    </style:style>
    <style:style style:name="SectionLabel" style:family="paragraph">
      <style:paragraph-properties fo:margin-top="0.5cm" fo:margin-bottom="0.15cm" fo:keep-with-next="always"/>
      <style:text-properties fo:font-size="10pt" fo:font-weight="bold" fo:color="#1a1a2e" fo:text-transform="uppercase" fo:letter-spacing="0.05cm"/>
    </style:style>
    <style:style style:name="ListItem" style:family="paragraph">
      <style:paragraph-properties fo:margin-left="0.6cm" fo:margin-bottom="0.15cm" fo:line-height="140%"/>
      <style:text-properties fo:font-size="10.5pt" fo:color="#222222"/>
    </style:style>
    <style:style style:name="Footer" style:family="paragraph">
      <style:paragraph-properties fo:text-align="center"/>
      <style:text-properties fo:font-size="9pt" fo:color="#888888" fo:font-style="italic"/>
    </style:style>
    <text:list-style style:name="BulletList">
      <text:list-level-style-bullet text:level="1" text:bullet-char="›">
        <style:list-level-properties text:space-before="0.4cm" text:min-label-width="0.4cm"/>
        <style:text-properties fo:color="#c8a000" fo:font-size="13pt"/>
      </text:list-level-style-bullet>
    </text:list-style>
  </office:styles>
  <office:master-styles>
    <style:master-page style:name="Standard" style:page-layout-name="PageLayout">
      <style:footer>
        <text:p text:style-name="Footer">Nixie Clock Ultra · broed digital media · 2026</text:p>
      </style:footer>
    </style:master-page>
  </office:master-styles>
</office:document-styles>
</file>

<file path=meta.xml><?xml version="1.0" encoding="utf-8"?>
<office:document-meta xmlns:office="urn:oasis:names:tc:opendocument:xmlns:office:1.0" xmlns:dc="http://purl.org/dc/elements/1.1/" xmlns:meta="urn:oasis:names:tc:opendocument:xmlns:meta:1.0" office:version="1.3">
  <office:meta>
    <dc:title>Nixie Clock Ultra – Werbetext</dc:title>
    <dc:creator>broed digital media</dc:creator>
    <dc:date>2026-06-29</dc:date>
    <meta:generator>gen_werbetext.py</meta:generator>
  </office:meta>
</office:document-meta>
</file>